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paragraph-properties fo:line-height="115%"/>
      <style:text-properties fo:font-size="16pt" fo:language="zxx" fo:country="none" officeooo:paragraph-rsid="00062049" style:font-size-asian="16pt" style:language-asian="zxx" style:country-asian="none" style:font-size-complex="16pt" style:language-complex="zxx" style:country-complex="none"/>
    </style:style>
    <style:style style:name="P2" style:family="paragraph" style:parent-style-name="Title">
      <style:paragraph-properties fo:line-height="115%"/>
      <style:text-properties officeooo:paragraph-rsid="00062049"/>
    </style:style>
    <style:style style:name="P3" style:family="paragraph" style:parent-style-name="Centered">
      <style:paragraph-properties fo:line-height="115%"/>
      <style:text-properties fo:font-size="10pt" fo:language="zxx" fo:country="none" style:font-size-asian="10pt" style:language-asian="zxx" style:country-asian="none" style:font-size-complex="10pt" style:language-complex="zxx" style:country-complex="none"/>
    </style:style>
    <style:style style:name="P4" style:family="paragraph" style:parent-style-name="Standard">
      <style:paragraph-properties fo:line-height="115%"/>
      <style:text-properties fo:font-size="10pt" fo:language="zxx" fo:country="none" style:font-size-asian="10pt" style:language-asian="zxx" style:country-asian="none" style:font-size-complex="10pt" style:language-complex="zxx" style:country-complex="none"/>
    </style:style>
    <style:style style:name="P5" style:family="paragraph" style:parent-style-name="Standard">
      <style:paragraph-properties fo:line-height="115%" style:writing-mode="lr-tb" style:writing-mode-automatic="false"/>
      <style:text-properties fo:font-size="10pt" fo:language="zxx" fo:country="none" officeooo:rsid="000a5009" style:font-size-asian="10pt" style:language-asian="zxx" style:country-asian="none" style:font-size-complex="10pt" style:language-complex="zxx" style:country-complex="none"/>
    </style:style>
    <style:style style:name="P6" style:family="paragraph" style:parent-style-name="Section">
      <style:paragraph-properties fo:line-height="115%"/>
      <style:text-properties fo:font-size="10pt" fo:language="zxx" fo:country="none" style:font-size-asian="10pt" style:language-asian="zxx" style:country-asian="none" style:font-size-complex="10pt" style:language-complex="zxx" style:country-complex="none"/>
    </style:style>
    <style:style style:name="P7" style:family="paragraph" style:parent-style-name="Item">
      <style:paragraph-properties fo:line-height="115%"/>
    </style:style>
    <style:style style:name="P8" style:family="paragraph" style:parent-style-name="Item">
      <style:paragraph-properties fo:line-height="115%"/>
      <style:text-properties officeooo:paragraph-rsid="00062049"/>
    </style:style>
    <style:style style:name="P9" style:family="paragraph" style:parent-style-name="Item">
      <style:paragraph-properties fo:line-height="115%"/>
      <style:text-properties fo:font-size="10pt" fo:language="zxx" fo:country="none" fo:font-weight="bold" officeooo:rsid="00062049" officeooo:paragraph-rsid="0016ba97" style:font-size-asian="10pt" style:language-asian="zxx" style:country-asian="none" style:font-weight-asian="bold" style:font-size-complex="10pt" style:language-complex="zxx" style:country-complex="none" style:font-weight-complex="bold"/>
    </style:style>
    <style:style style:name="P10" style:family="paragraph" style:parent-style-name="Item">
      <style:paragraph-properties fo:line-height="115%"/>
      <style:text-properties fo:font-size="10pt" fo:language="zxx" fo:country="none" fo:font-style="italic" officeooo:paragraph-rsid="0009b2c0" style:font-size-asian="10pt" style:language-asian="zxx" style:country-asian="none" style:font-style-asian="italic" style:font-size-complex="10pt" style:language-complex="zxx" style:country-complex="none" style:font-style-complex="italic"/>
    </style:style>
    <style:style style:name="P11" style:family="paragraph" style:parent-style-name="Item" style:list-style-name="L1">
      <style:paragraph-properties fo:line-height="115%"/>
      <style:text-properties fo:font-size="10pt" fo:language="zxx" fo:country="none" officeooo:paragraph-rsid="0009b2c0" style:font-size-asian="10pt" style:language-asian="zxx" style:country-asian="none" style:font-size-complex="10pt" style:language-complex="zxx" style:country-complex="none"/>
    </style:style>
    <style:style style:name="P12" style:family="paragraph" style:parent-style-name="Item">
      <style:paragraph-properties fo:line-height="115%"/>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3" style:family="paragraph" style:parent-style-name="Bullet" style:list-style-name="L2">
      <style:paragraph-properties fo:line-height="115%"/>
      <style:text-properties fo:font-size="10pt" fo:language="zxx" fo:country="none" style:font-size-asian="10pt" style:language-asian="zxx" style:country-asian="none" style:font-size-complex="10pt" style:language-complex="zxx" style:country-complex="none"/>
    </style:style>
    <style:style style:name="P14" style:family="paragraph" style:parent-style-name="Bullet" style:list-style-name="L3">
      <style:paragraph-properties fo:line-height="115%"/>
      <style:text-properties fo:font-size="10pt" fo:language="zxx" fo:country="none" style:font-size-asian="10pt" style:language-asian="zxx" style:country-asian="none" style:font-size-complex="10pt" style:language-complex="zxx" style:country-complex="none"/>
    </style:style>
    <style:style style:name="P15" style:family="paragraph" style:parent-style-name="Item">
      <style:paragraph-properties fo:line-height="115%"/>
      <style:text-properties officeooo:paragraph-rsid="0007664f"/>
    </style:style>
    <style:style style:name="P16" style:family="paragraph" style:parent-style-name="Item">
      <style:paragraph-properties fo:line-height="115%" style:writing-mode="lr-tb" style:writing-mode-automatic="false"/>
      <style:text-properties fo:font-size="10pt" fo:language="zxx" fo:country="none" fo:font-style="italic" officeooo:rsid="000b9d45" officeooo:paragraph-rsid="000b9d45" style:font-size-asian="10pt" style:language-asian="zxx" style:country-asian="none" style:font-style-asian="italic" style:font-size-complex="10pt" style:language-complex="zxx" style:country-complex="none" style:font-style-complex="italic"/>
    </style:style>
    <style:style style:name="P17" style:family="paragraph" style:parent-style-name="Item">
      <style:paragraph-properties fo:line-height="115%"/>
      <style:text-properties fo:font-size="10pt" fo:language="zxx" fo:country="none" style:font-size-asian="10pt" style:language-asian="zxx" style:country-asian="none" style:font-size-complex="10pt" style:language-complex="zxx" style:country-complex="none"/>
    </style:style>
    <style:style style:name="P18" style:family="paragraph" style:parent-style-name="Section">
      <style:paragraph-properties fo:line-height="115%"/>
      <style:text-properties fo:font-size="10pt" fo:language="zxx" fo:country="none" officeooo:rsid="000b9d45" officeooo:paragraph-rsid="000b9d45" style:font-size-asian="10pt" style:language-asian="zxx" style:country-asian="none" style:font-size-complex="10pt" style:language-complex="zxx" style:country-complex="none"/>
    </style:style>
    <style:style style:name="P19" style:family="paragraph" style:parent-style-name="Item">
      <style:paragraph-properties fo:line-height="115%"/>
      <style:text-properties fo:font-size="10pt" fo:language="zxx" fo:country="none" fo:font-style="italic" officeooo:rsid="000b9d45" officeooo:paragraph-rsid="000b9d45" style:font-size-asian="10pt" style:language-asian="zxx" style:country-asian="none" style:font-style-asian="italic" style:font-size-complex="10pt" style:language-complex="zxx" style:country-complex="none" style:font-style-complex="italic"/>
    </style:style>
    <style:style style:name="P20" style:family="paragraph" style:parent-style-name="Item">
      <style:paragraph-properties fo:line-height="115%" style:writing-mode="lr-tb" style:writing-mode-automatic="false"/>
      <style:text-properties officeooo:paragraph-rsid="000d5b58"/>
    </style:style>
    <style:style style:name="P21" style:family="paragraph" style:parent-style-name="Item">
      <style:paragraph-properties fo:line-height="115%"/>
      <style:text-properties fo:font-size="10pt" fo:language="zxx" fo:country="none" officeooo:paragraph-rsid="000d5b58" style:font-size-asian="10pt" style:language-asian="zxx" style:country-asian="none" style:font-size-complex="10pt" style:language-complex="zxx" style:country-complex="none"/>
    </style:style>
    <style:style style:name="T1" style:family="text">
      <style:text-properties fo:font-size="16pt" fo:language="zxx" fo:country="none" style:font-size-asian="16pt" style:language-asian="zxx" style:country-asian="none" style:font-size-complex="16pt" style:language-complex="zxx" style:country-complex="none"/>
    </style:style>
    <style:style style:name="T2" style:family="text">
      <style:text-properties fo:font-size="16pt" fo:language="zxx" fo:country="none" fo:font-style="italic" style:font-size-asian="16pt" style:language-asian="zxx" style:country-asian="none" style:font-style-asian="italic" style:font-size-complex="16pt" style:language-complex="zxx" style:country-complex="none" style:font-style-complex="italic"/>
    </style:style>
    <style:style style:name="T3" style:family="text">
      <style:text-properties fo:font-size="16pt" fo:language="zxx" fo:country="none" fo:font-style="italic" officeooo:rsid="00062049" style:font-size-asian="16pt" style:language-asian="zxx" style:country-asian="none" style:font-style-asian="italic" style:font-size-complex="16pt" style:language-complex="zxx" style:country-complex="none" style:font-style-complex="italic"/>
    </style:style>
    <style:style style:name="T4" style:family="text">
      <style:text-properties fo:font-size="16pt" fo:language="zxx" fo:country="none" fo:font-style="italic" officeooo:rsid="0012ddfc" style:font-size-asian="16pt" style:language-asian="zxx" style:country-asian="none" style:font-style-asian="italic" style:font-size-complex="16pt" style:language-complex="zxx" style:country-complex="none" style:font-style-complex="italic"/>
    </style:style>
    <style:style style:name="T5" style:family="text">
      <style:text-properties officeooo:rsid="00062049"/>
    </style:style>
    <style:style style:name="T6" style:family="text">
      <style:text-properties fo:font-size="10pt" fo:language="zxx" fo:country="none" officeooo:rsid="00062049" style:font-size-asian="10pt" style:language-asian="zxx" style:country-asian="none" style:font-size-complex="10pt" style:language-complex="zxx" style:country-complex="none"/>
    </style:style>
    <style:style style:name="T7" style:family="text">
      <style:text-properties fo:font-size="10pt" fo:language="zxx" fo:country="none" style:font-size-asian="10pt" style:language-asian="zxx" style:country-asian="none" style:font-size-complex="10pt" style:language-complex="zxx" style:country-complex="none"/>
    </style:style>
    <style:style style:name="T8" style:family="text">
      <style:text-properties fo:font-size="10pt" fo:language="zxx" fo:country="none" officeooo:rsid="000f3e1d" style:font-size-asian="10pt" style:language-asian="zxx" style:country-asian="none" style:font-size-complex="10pt" style:language-complex="zxx" style:country-complex="none"/>
    </style:style>
    <style:style style:name="T9" style:family="text">
      <style:text-properties fo:font-size="10pt" fo:language="zxx" fo:country="none" officeooo:rsid="00111857" style:font-size-asian="10pt" style:language-asian="zxx" style:country-asian="none" style:font-size-complex="10pt" style:language-complex="zxx" style:country-complex="none"/>
    </style:style>
    <style:style style:name="T10" style:family="text">
      <style:text-properties fo:font-weight="normal" style:font-weight-asian="normal" style:font-weight-complex="normal"/>
    </style:style>
    <style:style style:name="T11" style:family="text">
      <style:text-properties fo:font-weight="normal" officeooo:rsid="00158804" style:font-weight-asian="normal" style:font-weight-complex="normal"/>
    </style:style>
    <style:style style:name="T12" style:family="text">
      <style:text-properties fo:font-weight="normal" officeooo:rsid="0016ba97" style:font-weight-asian="normal" style:font-weight-complex="normal"/>
    </style:style>
    <style:style style:name="T13" style:family="text">
      <style:text-properties fo:font-size="10pt" fo:language="zxx" fo:country="none" officeooo:rsid="0007664f" style:font-size-asian="10pt" style:language-asian="zxx" style:country-asian="none" style:font-size-complex="10pt" style:language-complex="zxx" style:country-complex="none"/>
    </style:style>
    <style:style style:name="T14" style:family="text">
      <style:text-properties fo:font-size="10pt" fo:language="zxx" fo:country="none" officeooo:rsid="000b7aaf" style:font-size-asian="10pt" style:language-asian="zxx" style:country-asian="none" style:font-size-complex="10pt" style:language-complex="zxx" style:country-complex="none"/>
    </style:style>
    <style:style style:name="T15" style:family="text">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 style:family="text">
      <style:text-properties fo:font-size="10pt" fo:language="zxx" fo:country="none" fo:font-style="italic" fo:font-weight="normal" officeooo:rsid="0011185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 style:family="text">
      <style:text-properties fo:font-size="10pt" fo:language="zxx" fo:country="none" officeooo:rsid="0009b2c0" style:font-size-asian="10pt" style:language-asian="zxx" style:country-asian="none" style:font-size-complex="10pt" style:language-complex="zxx" style:country-complex="none"/>
    </style:style>
    <style:style style:name="T18" style:family="text">
      <style:text-properties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9" style:family="text">
      <style:text-properties fo:font-size="10pt" fo:language="zxx" fo:country="none" fo:font-style="italic" style:text-underline-style="none" fo:font-weight="normal" officeooo:rsid="000f3e1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20"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21" style:family="text">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fo:font-weight="bold" officeooo:rsid="0007664f" style:font-style-asian="normal" style:font-weight-asian="bold" style:font-style-complex="normal" style:font-weight-complex="bold"/>
    </style:style>
    <style:style style:name="T25" style:family="text">
      <style:text-properties officeooo:rsid="0007664f"/>
    </style:style>
    <style:style style:name="T26" style:family="text">
      <style:text-properties fo:font-style="normal" officeooo:rsid="0007664f" style:font-style-asian="normal" style:font-style-complex="normal"/>
    </style:style>
    <style:style style:name="T27" style:family="text">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officeooo:rsid="000d5b58" style:font-size-asian="10pt" style:font-style-asian="normal" style:font-size-complex="10pt" style:font-style-complex="normal"/>
    </style:style>
    <style:style style:name="T30" style:family="text">
      <style:text-properties fo:font-size="10pt" fo:language="zxx" fo:country="none" fo:font-style="normal" fo:font-weight="normal" officeooo:rsid="000b9d4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1" style:family="text">
      <style:text-properties fo:font-size="10pt" fo:language="zxx" fo:country="none" fo:font-style="normal" fo:font-weight="normal" officeooo:rsid="000d5b5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2" style:family="text">
      <style:text-properties fo:font-size="10pt" fo:language="zxx" fo:country="none" fo:font-style="normal" fo:font-weight="bold" officeooo:rsid="000b9d45"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3" style:family="text">
      <style:text-properties fo:font-style="italic" style:font-style-asian="italic" style:font-style-complex="italic"/>
    </style:style>
    <style:style style:name="T34" style:family="text">
      <style:text-properties fo:font-style="italic" officeooo:rsid="0007664f"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Addison Amin Reyes Cedano</text:span><text:span text:style-name="Strong"><text:span text:style-name="T2"> </text:span></text:span><text:span text:style-name="Strong"><text:span text:style-name="T3">| </text:span></text:span><text:span text:style-name="Strong"><text:span text:style-name="T4">Full-stack </text:span></text:span><text:span text:style-name="Strong"><text:span text:style-name="T3">Software Engineer</text:span></text:span></text:p>
      <text:p text:style-name="P3">Santo Domingo, Dominican Republic | +1 849-359-3664 | addison.amin@gmail.com | <text:a xlink:type="simple" xlink:href="https://addisonreyes.com/" text:style-name="Internet_20_link" text:visited-style-name="Visited_20_Internet_20_Link">addisonreyes.com</text:a> | <text:a xlink:type="simple" xlink:href="https://linkedin.com/in/addison-reyes-9aa017208" text:style-name="Internet_20_link" text:visited-style-name="Visited_20_Internet_20_Link"><text:span text:style-name="T5">Linkedin</text:span></text:a> | <text:a xlink:type="simple" xlink:href="https://github.com/AddisonReyes" text:style-name="Internet_20_link" text:visited-style-name="Visited_20_Internet_20_Link">github</text:a></text:p>
      <text:p text:style-name="P4"/>
      <text:p text:style-name="P5">Full-stack software engineer and game developer focused on building practical applications, backend systems, APIs, automation workflows, and indie games. Experienced with TypeScript, React, React Native, Next.js, Python, Django, FastAPI, Rust, databases, authentication, data modeling, BI/reporting tools, and Dockerized delivery. I enjoy working across product interfaces, backend logic, deployment workflows, and interactive systems, with a strong interest in clean code, performance, user experience, and understanding how software works behind the scenes.</text:p>
      <text:p text:style-name="P6"><text:line-break/>Skills</text:p>
      <text:p text:style-name="P7"><text:span text:style-name="Strong"><text:span text:style-name="T6">Programming l</text:span></text:span><text:span text:style-name="Strong"><text:span text:style-name="T7">anguages:</text:span></text:span><text:span text:style-name="T7"> Python, TypeScript, Rust</text:span></text:p>
      <text:p text:style-name="P7"><text:span text:style-name="Strong"><text:span text:style-name="T7">Frontend:</text:span></text:span><text:span text:style-name="T7"> </text:span><text:span text:style-name="T8">Expo, React Native, </text:span><text:span text:style-name="T7">Next.js, React, Tailwind CSS</text:span><text:span text:style-name="T9">, </text:span><text:span text:style-name="T7">HTML, CSS</text:span></text:p>
      <text:p text:style-name="P7"><text:span text:style-name="Strong"><text:span text:style-name="T7">Backend:</text:span></text:span><text:span text:style-name="T7"> Django, FastAPI, REST APIs, OpenAPI/Swagger, async programming, backend architecture</text:span></text:p>
      <text:p text:style-name="P8"><text:span text:style-name="Strong"><text:span text:style-name="T7">Tools and infrastructure:</text:span></text:span><text:span text:style-name="T7"> Docker, Git, Linux, CI/CD basics, API integration, deployment workflows</text:span></text:p>
      <text:p text:style-name="P9">Databases: <text:span text:style-name="T10">PostgreSQL, </text:span><text:span text:style-name="T11">Microsoft SQL Server, T-</text:span><text:span text:style-name="T10">SQL, NoSQL, </text:span><text:span text:style-name="T12">MongoDB, Cloudflare R2</text:span></text:p>
      <text:p text:style-name="P6"><text:line-break/>Experience</text:p>
      <text:p text:style-name="P7"><text:span text:style-name="Strong"><text:span text:style-name="T7">SEMS, SRL | Distrito Nacional, Dominican Republic</text:span></text:span><text:span text:style-name="T7"> | May 2024 - Present</text:span></text:p>
      <text:p text:style-name="P10">Software Developer | Full-time, Hybrid</text:p>
      <text:list text:style-name="L1">
        <text:list-item>
          <text:p text:style-name="P11">Developed and customized Odoo 16 modules to automate internal business processes, including workflow extensions and feature customization across ERP operations. </text:p>
        </text:list-item>
        <text:list-item>
          <text:p text:style-name="P11">Built integrations between Odoo and internal Django-based systems to synchronize operational data and automate purchasing workflows. </text:p>
        </text:list-item>
        <text:list-item>
          <text:p text:style-name="P11">Implemented functionality that allowed material request orders created in an internal ordering application to be automatically generated as purchase workflows inside Odoo. </text:p>
        </text:list-item>
        <text:list-item>
          <text:p text:style-name="P11">Developed internal web applications using React, TypeScript, Vite, and FastAPI, including a customer price catalog management platform. </text:p>
        </text:list-item>
        <text:list-item>
          <text:p text:style-name="P11">Contributed to frontend mobile development using Flutter for internal business applications. </text:p>
        </text:list-item>
        <text:list-item>
          <text:p text:style-name="P11">Designed backend logic, APIs, and database interactions to support internal operational tools and cross-system communication. </text:p>
        </text:list-item>
        <text:list-item>
          <text:p text:style-name="P11">Collaborated with internal teams and stakeholders to translate operational requirements into software solutions and process automation tools.</text:p>
        </text:list-item>
      </text:list>
      <text:p text:style-name="P7"><text:span text:style-name="Strong"><text:span text:style-name="T7"/></text:span></text:p>
      <text:p text:style-name="P7"><text:span text:style-name="Strong"><text:span text:style-name="T7">SEMS, SRL | Distrito Nacional, Dominican Republic</text:span></text:span><text:span text:style-name="T7"> | Feb 2024 - May 2024</text:span></text:p>
      <text:p text:style-name="P12">Data Analyst | Internship, On-site</text:p>
      <text:list text:style-name="L2">
        <text:list-item>
          <text:p text:style-name="P13">Developed internal reporting and data analysis solutions to support operational visibility and business decision-making.</text:p>
        </text:list-item>
        <text:list-item>
          <text:p text:style-name="P13">Collaborated on the development of a Slack bot that delivered automated daily fuel consumption and pricing analytics reports.</text:p>
        </text:list-item>
        <text:list-item>
          <text:p text:style-name="P13">Built automated visualization workflows and reporting processes to reduce manual analysis and improve data accessibility.</text:p>
        </text:list-item>
      </text:list>
      <text:p text:style-name="P7"><text:span text:style-name="Strong"><text:span text:style-name="T7"/></text:span></text:p>
      <text:p text:style-name="P7"><text:span text:style-name="Strong"><text:span text:style-name="T7">OXSIS, SRL | Santo Domingo Este, Dominican Republic</text:span></text:span><text:span text:style-name="T7"> | Sep 2020 - Aug 2025</text:span></text:p>
      <text:p text:style-name="P12">IT Support Specialist | Part-time, Hybrid</text:p>
      <text:list text:style-name="L3">
        <text:list-item>
          <text:p text:style-name="P14">Provided technical support and troubleshooting for office hardware, printers, email accounts, and internal business systems.</text:p>
        </text:list-item>
        <text:list-item>
          <text:p text:style-name="P14">Assisted users with ADM Cloud and other operational software platforms used in logistics and customs services workflows.</text:p>
        </text:list-item>
        <text:list-item>
          <text:p text:style-name="P14">Supported accounting operations through invoice digitization, document scanning, and administrative technical assistance.</text:p>
        </text:list-item>
        <text:list-item>
          <text:p text:style-name="P14">Performed general IT maintenance and end-user support across internal company operations.</text:p>
        </text:list-item>
      </text:list>
      <text:p text:style-name="P6"/>
      <text:p text:style-name="P6"/>
      <text:p text:style-name="P6"><text:soft-page-break/>Projects</text:p>
      <text:p text:style-name="P7"><text:span text:style-name="Strong"><text:span text:style-name="T7">MiniFT - Personal Finance Tracking Application</text:span></text:span><text:span text:style-name="T7"> | </text:span><text:a xlink:type="simple" xlink:href="https://minift.net/" text:style-name="Internet_20_link" text:visited-style-name="Visited_20_Internet_20_Link"><text:span text:style-name="T13">Website</text:span></text:a><text:span text:style-name="T13"> </text:span><text:span text:style-name="T14">| </text:span><text:a xlink:type="simple" xlink:href="https://minift-backend.up.railway.app/docs/" text:style-name="Internet_20_link" text:visited-style-name="Visited_20_Internet_20_Link"><text:span text:style-name="T14">API Docs</text:span></text:a><text:span text:style-name="T14"> | </text:span><text:a xlink:type="simple" xlink:href="https://github.com/AddisonReyes/MiniFT" text:style-name="Internet_20_link" text:visited-style-name="Visited_20_Internet_20_Link"><text:span text:style-name="T14">Source code</text:span></text:a></text:p>
      <text:p text:style-name="P15"><text:span text:style-name="T7">Performance-oriented finance tracker with a Rust backend, PostgreSQL, authentication, Dockerized deployment, and a TypeScript dashboard. Designed a production-style backend with strongly typed domain logic, persistence, authentication, and deployment-ready configuration. </text:span><text:span text:style-name="Strong"><text:span text:style-name="T15">Tech:</text:span></text:span><text:span text:style-name="T15"> Rust, Rocket, PostgreSQL, TypeScript, Next.js, React, Tailwind CSS, </text:span><text:span text:style-name="T16">Capacitor, </text:span><text:span text:style-name="T15">Docker</text:span></text:p>
      <text:p text:style-name="P7"><text:span text:style-name="Strong"><text:span text:style-name="T7"><text:line-break/>AnimeSR - Recommendation and Discovery Platform</text:span></text:span><text:span text:style-name="T7"> | </text:span><text:a xlink:type="simple" xlink:href="https://animesr.pages.dev/" text:style-name="Internet_20_link" text:visited-style-name="Visited_20_Internet_20_Link"><text:span text:style-name="T13">Website</text:span></text:a><text:span text:style-name="T7"> | </text:span><text:a xlink:type="simple" xlink:href="https://animesr.up.railway.app/docs" text:style-name="Internet_20_link" text:visited-style-name="Visited_20_Internet_20_Link"><text:span text:style-name="T7">API Docs</text:span></text:a><text:span text:style-name="T7"> | </text:span><text:a xlink:type="simple" xlink:href="https://github.com/AddisonReyes/AnimeSR" text:style-name="Internet_20_link" text:visited-style-name="Visited_20_Internet_20_Link"><text:span text:style-name="T14">Source c</text:span><text:span text:style-name="T7">ode</text:span></text:a></text:p>
      <text:p text:style-name="P15"><text:span text:style-name="T7">Recommendation-oriented catalog pairing FastAPI backend filtering, search, and machine-learning-assisted discovery with a TypeScript interface. Built backend search, recommendation services, REST endpoints, and API documentation for catalog discovery. </text:span><text:span text:style-name="Strong"><text:span text:style-name="T15">Tech:</text:span></text:span><text:span text:style-name="T15"> Python, FastAPI, Scikit-learn, Next.js, React, TypeScript, Docker</text:span></text:p>
      <text:p text:style-name="P7"><text:span text:style-name="Strong"><text:span text:style-name="T7"/></text:span></text:p>
      <text:p text:style-name="P7"><text:span text:style-name="Strong"><text:span text:style-name="T8">Done Loop</text:span></text:span><text:span text:style-name="Strong"><text:span text:style-name="T7"> – </text:span></text:span><text:span text:style-name="Strong"><text:span text:style-name="T8">Mobile</text:span></text:span><text:span text:style-name="Strong"><text:span text:style-name="T17"> l</text:span></text:span><text:span text:style-name="Strong"><text:span text:style-name="T7">ocal-First Productivity Application</text:span></text:span><text:span text:style-name="T7"> | </text:span><text:a xlink:type="simple" xlink:href="https://done-loop.pages.dev/" text:style-name="Internet_20_link" text:visited-style-name="Visited_20_Internet_20_Link"><text:span text:style-name="T13">Website</text:span></text:a><text:span text:style-name="T7"> | </text:span><text:a xlink:type="simple" xlink:href="https://github.com/AddisonReyes/done-loop" text:style-name="Internet_20_link" text:visited-style-name="Visited_20_Internet_20_Link"><text:span text:style-name="T14">Source c</text:span><text:span text:style-name="T7">ode</text:span></text:a></text:p>
      <text:p text:style-name="P15"><text:span text:style-name="T7">Done Loop is a free, open source, local-first productivity app for habits, tasks, calendar context, reminders, and lightweight daily planning. </text:span><text:span text:style-name="Strong"><text:span text:style-name="T18">Tech:</text:span></text:span><text:span text:style-name="T18"> TypeScript, </text:span><text:span text:style-name="T19">Expo</text:span><text:span text:style-name="T18">, React </text:span><text:span text:style-name="T19">Native</text:span><text:span text:style-name="T18">, </text:span><text:span text:style-name="T19">SQLite</text:span></text:p>
      <text:p text:style-name="P6"><text:line-break/>Education</text:p>
      <text:p text:style-name="P7"><text:span text:style-name="Strong"><text:span text:style-name="T7">UNICARIBE - </text:span></text:span><text:span text:style-name="Strong"><text:span text:style-name="T20">Engineering Degree, Software Engineering</text:span></text:span><text:span text:style-name="T7"> | </text:span><text:span text:style-name="T21">Apr 2025 – Present</text:span></text:p>
      <text:p text:style-name="P16"><text:span text:style-name="T22">TECH Global University -</text:span> <text:span text:style-name="T23">Diploma of efucation, Backend Engineering </text:span>| Oct 2025 – Nov 2025</text:p>
      <text:p text:style-name="P7"><text:span text:style-name="Strong"><text:span text:style-name="T7">ITLA - </text:span></text:span><text:span text:style-name="Strong"><text:span text:style-name="T20">Associate Degree, Artificial Intelligence</text:span></text:span><text:span text:style-name="T7"> | </text:span><text:span text:style-name="T21">Aug 2021 - Dec 2023</text:span></text:p>
      <text:p text:style-name="P17"/>
      <text:p text:style-name="P18">Courses and certifications</text:p>
      <text:p text:style-name="P19"><text:span text:style-name="T24">TALENDIG</text:span><text:span text:style-name="T25"> - </text:span><text:span text:style-name="T26">B</text:span><text:span text:style-name="T23">ootcamp, Fullstack developer</text:span> | Jul 2025 - Jan 2026</text:p>
      <text:p text:style-name="P16"><text:span text:style-name="T22">INFOTEP -</text:span><text:span text:style-name="T23"> Technical degree, Database Programming</text:span> | Jan 2024 – Dec 2024</text:p>
      <text:p text:style-name="P16"/>
      <text:p text:style-name="P20"><text:span text:style-name="T27">Completion certificates, IT credentials and certifications collected across software engineering</text:span><text:span text:style-name="T28"> </text:span><text:span text:style-name="T29">|</text:span><text:span text:style-name="T28"> </text:span><text:a xlink:type="simple" xlink:href="https://certificates-4fx.pages.dev/" text:style-name="Internet_20_link" text:visited-style-name="Visited_20_Internet_20_Link"><text:span text:style-name="T30">Certificate</text:span><text:span text:style-name="T31">s website</text:span></text:a><text:span text:style-name="T32"> </text:span></text:p>
      <text:p text:style-name="P21"/>
      <text:p text:style-name="P6">Languages</text:p>
      <text:p text:style-name="P17">Spanish - <text:span text:style-name="T33">Native</text:span> | English - <text:span text:style-name="T34">C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DO"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DO"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22%" fo:text-align="justify" style:justify-single-word="false"/>
      <style:text-properties fo:color="#000000" loext:opacity="100%" style:font-name="Times New Roman" fo:font-family="'Times New Roman'"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Standard" style:class="chapter">
      <style:paragraph-properties fo:margin-top="0cm" fo:margin-bottom="0.051cm" style:contextual-spacing="false" fo:text-align="center" style:justify-single-word="false"/>
      <style:text-properties fo:font-size="18pt" fo:font-weight="bold"/>
    </style:style>
    <style:style style:name="Centered" style:family="paragraph" style:parent-style-name="Standard">
      <style:paragraph-properties fo:margin-top="0cm" fo:margin-bottom="0.102cm" style:contextual-spacing="false" fo:text-align="center" style:justify-single-word="false"/>
    </style:style>
    <style:style style:name="Section" style:family="paragraph" style:parent-style-name="Standard">
      <style:paragraph-properties fo:margin-top="0.203cm" fo:margin-bottom="0.076cm" style:contextual-spacing="false" fo:text-align="left" style:justify-single-word="false" fo:padding-left="0cm" fo:padding-right="0cm" fo:padding-top="0cm" fo:padding-bottom="0.025cm" fo:border-left="none" fo:border-right="none" fo:border-top="none" fo:border-bottom="0.74pt solid #000000"/>
      <style:text-properties fo:font-weight="bold"/>
    </style:style>
    <style:style style:name="Item" style:family="paragraph" style:parent-style-name="Standard">
      <style:paragraph-properties fo:margin-top="0.051cm" fo:margin-bottom="0.025cm" style:contextual-spacing="false"/>
    </style:style>
    <style:style style:name="Bullet" style:family="paragraph" style:parent-style-name="Standard">
      <style:paragraph-properties fo:margin-left="0.457cm" fo:margin-top="0cm" fo:margin-bottom="0.025cm" style:contextual-spacing="false" fo:text-indent="-0.457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Strong" style:family="text">
      <style:text-properties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0.889cm" fo:margin-bottom="0.889cm" fo:margin-left="1.219cm" fo:margin-right="1.2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Linux_X86_64 LibreOffice_project/d4d5ed47b6084125f28d269a5650105d54dde034</meta:generator>
    <meta:creation-date>2026-05-18T21:12:55.552913969</meta:creation-date>
    <meta:editing-duration>PT1H6M29S</meta:editing-duration>
    <meta:editing-cycles>15</meta:editing-cycles>
    <dc:date>2026-06-15T23:29:08.428400390</dc:date>
    <meta:print-date>2026-06-15T23:26:26.415676445</meta:print-date>
    <meta:printed-by>Archivos PDF</meta:printed-by>
    <meta:document-statistic meta:table-count="0" meta:image-count="0" meta:object-count="0" meta:page-count="2" meta:paragraph-count="47" meta:word-count="655" meta:character-count="4941" meta:non-whitespace-character-count="4332"/>
  </office:meta>
</office:document-meta>
</file>