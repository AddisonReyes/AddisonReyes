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Title">
      <style:paragraph-properties fo:line-height="115%"/>
      <style:text-properties fo:font-size="16pt" fo:language="zxx" fo:country="none" officeooo:paragraph-rsid="00062049" style:font-size-asian="16pt" style:language-asian="zxx" style:country-asian="none" style:font-size-complex="16pt" style:language-complex="zxx" style:country-complex="none"/>
    </style:style>
    <style:style style:name="P2" style:family="paragraph" style:parent-style-name="Title">
      <style:paragraph-properties fo:line-height="115%"/>
      <style:text-properties officeooo:paragraph-rsid="00062049"/>
    </style:style>
    <style:style style:name="P3" style:family="paragraph" style:parent-style-name="Centered">
      <style:paragraph-properties fo:line-height="115%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" style:family="paragraph" style:parent-style-name="Standard">
      <style:paragraph-properties fo:line-height="115%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" style:family="paragraph" style:parent-style-name="Section">
      <style:paragraph-properties fo:line-height="115%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" style:family="paragraph" style:parent-style-name="Item">
      <style:paragraph-properties fo:line-height="115%"/>
    </style:style>
    <style:style style:name="P7" style:family="paragraph" style:parent-style-name="Item">
      <style:paragraph-properties fo:line-height="115%"/>
      <style:text-properties officeooo:paragraph-rsid="00062049"/>
    </style:style>
    <style:style style:name="P8" style:family="paragraph" style:parent-style-name="Item">
      <style:paragraph-properties fo:line-height="115%"/>
      <style:text-properties fo:font-size="10pt" fo:language="zxx" fo:country="none" fo:font-weight="bold" officeooo:rsid="00062049" officeooo:paragraph-rsid="0006204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Item">
      <style:paragraph-properties fo:line-height="115%"/>
      <style:text-properties fo:font-size="10pt" fo:language="zxx" fo:country="none" fo:font-style="italic" officeooo:paragraph-rsid="0009b2c0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0" style:family="paragraph" style:parent-style-name="Item" style:list-style-name="L1">
      <style:paragraph-properties fo:line-height="115%"/>
      <style:text-properties fo:font-size="10pt" fo:language="zxx" fo:country="none" officeooo:paragraph-rsid="0009b2c0" style:font-size-asian="10pt" style:language-asian="zxx" style:country-asian="none" style:font-size-complex="10pt" style:language-complex="zxx" style:country-complex="none"/>
    </style:style>
    <style:style style:name="P11" style:family="paragraph" style:parent-style-name="Item">
      <style:paragraph-properties fo:line-height="115%"/>
      <style:text-properties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2" style:family="paragraph" style:parent-style-name="Bullet" style:list-style-name="L2">
      <style:paragraph-properties fo:line-height="115%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3" style:family="paragraph" style:parent-style-name="Bullet" style:list-style-name="L3">
      <style:paragraph-properties fo:line-height="115%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4" style:family="paragraph" style:parent-style-name="Section">
      <style:paragraph-properties fo:line-height="115%"/>
      <style:text-properties fo:color="#000000" loext:opacity="100%" style:font-name="Times New Roman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5" style:family="paragraph" style:parent-style-name="Item">
      <style:paragraph-properties fo:line-height="115%"/>
      <style:text-properties officeooo:paragraph-rsid="0007664f"/>
    </style:style>
    <style:style style:name="P16" style:family="paragraph" style:parent-style-name="Item">
      <style:paragraph-properties fo:line-height="115%" style:writing-mode="lr-tb" style:writing-mode-automatic="false"/>
      <style:text-properties fo:font-size="10pt" fo:language="zxx" fo:country="none" fo:font-style="italic" officeooo:rsid="000b9d45" officeooo:paragraph-rsid="000b9d45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7" style:family="paragraph" style:parent-style-name="Item">
      <style:paragraph-properties fo:line-height="115%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8" style:family="paragraph" style:parent-style-name="Section">
      <style:paragraph-properties fo:line-height="115%"/>
      <style:text-properties fo:font-size="10pt" fo:language="zxx" fo:country="none" officeooo:rsid="000b9d45" officeooo:paragraph-rsid="000b9d45" style:font-size-asian="10pt" style:language-asian="zxx" style:country-asian="none" style:font-size-complex="10pt" style:language-complex="zxx" style:country-complex="none"/>
    </style:style>
    <style:style style:name="P19" style:family="paragraph" style:parent-style-name="Item">
      <style:paragraph-properties fo:line-height="115%"/>
      <style:text-properties fo:font-size="10pt" fo:language="zxx" fo:country="none" fo:font-style="italic" officeooo:rsid="000b9d45" officeooo:paragraph-rsid="000b9d45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0" style:family="paragraph" style:parent-style-name="Item">
      <style:paragraph-properties fo:line-height="115%" style:writing-mode="lr-tb" style:writing-mode-automatic="false"/>
      <style:text-properties officeooo:paragraph-rsid="000d5b58"/>
    </style:style>
    <style:style style:name="P21" style:family="paragraph" style:parent-style-name="Item">
      <style:paragraph-properties fo:line-height="115%"/>
      <style:text-properties fo:font-size="10pt" fo:language="zxx" fo:country="none" officeooo:paragraph-rsid="000d5b58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2" style:family="text">
      <style:text-properties fo:font-size="16pt" fo:language="zxx" fo:country="none" fo:font-style="italic" style:font-size-asian="16pt" style:language-asian="zxx" style:country-asian="none" style:font-style-asian="italic" style:font-size-complex="16pt" style:language-complex="zxx" style:country-complex="none" style:font-style-complex="italic"/>
    </style:style>
    <style:style style:name="T3" style:family="text">
      <style:text-properties fo:font-size="16pt" fo:language="zxx" fo:country="none" fo:font-style="italic" officeooo:rsid="00062049" style:font-size-asian="16pt" style:language-asian="zxx" style:country-asian="none" style:font-style-asian="italic" style:font-size-complex="16pt" style:language-complex="zxx" style:country-complex="none" style:font-style-complex="italic"/>
    </style:style>
    <style:style style:name="T4" style:family="text">
      <style:text-properties officeooo:rsid="00062049"/>
    </style:style>
    <style:style style:name="T5" style:family="text">
      <style:text-properties officeooo:rsid="000a5009"/>
    </style:style>
    <style:style style:name="T6" style:family="text">
      <style:text-properties fo:font-size="10pt" fo:language="zxx" fo:country="none" officeooo:rsid="00062049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normal" officeooo:rsid="0006204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0pt" fo:language="zxx" fo:country="none" officeooo:rsid="0007664f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font-size="10pt" fo:language="zxx" fo:country="none" officeooo:rsid="000b7aaf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font-size="10pt" fo:language="zxx" fo:country="none" fo:font-style="italic" fo:font-weight="normal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13" style:family="text">
      <style:text-properties fo:font-size="10pt" fo:language="zxx" fo:country="none" officeooo:rsid="0009b2c0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font-size="10pt" fo:language="zxx" fo:country="none" fo:font-style="italic" style:text-underline-style="none" fo:font-weight="normal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15" style:family="text">
      <style:text-properties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" style:family="text">
      <style:text-properties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fo:font-weight="bold" officeooo:rsid="0007664f" style:font-style-asian="normal" style:font-weight-asian="bold" style:font-style-complex="normal" style:font-weight-complex="bold"/>
    </style:style>
    <style:style style:name="T20" style:family="text">
      <style:text-properties officeooo:rsid="0007664f"/>
    </style:style>
    <style:style style:name="T21" style:family="text">
      <style:text-properties fo:font-style="normal" officeooo:rsid="0007664f" style:font-style-asian="normal" style:font-style-complex="normal"/>
    </style:style>
    <style:style style:name="T22" style:family="text">
      <style:text-properties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3" style:family="text">
      <style:text-properties fo:font-size="10pt" fo:font-style="normal" style:font-size-asian="10pt" style:font-style-asian="normal" style:font-size-complex="10pt" style:font-style-complex="normal"/>
    </style:style>
    <style:style style:name="T24" style:family="text">
      <style:text-properties fo:font-size="10pt" fo:font-style="normal" officeooo:rsid="000d5b58" style:font-size-asian="10pt" style:font-style-asian="normal" style:font-size-complex="10pt" style:font-style-complex="normal"/>
    </style:style>
    <style:style style:name="T25" style:family="text">
      <style:text-properties fo:font-size="10pt" fo:language="zxx" fo:country="none" fo:font-style="normal" fo:font-weight="normal" officeooo:rsid="000b9d45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26" style:family="text">
      <style:text-properties fo:font-size="10pt" fo:language="zxx" fo:country="none" fo:font-style="normal" fo:font-weight="normal" officeooo:rsid="000d5b5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27" style:family="text">
      <style:text-properties fo:font-size="10pt" fo:language="zxx" fo:country="none" fo:font-style="normal" fo:font-weight="bold" officeooo:rsid="000b9d4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07664f" style:font-style-asian="italic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Addison Amin Reyes Cedano</text:span><text:span text:style-name="Strong"><text:span text:style-name="T2"> </text:span></text:span><text:span text:style-name="Strong"><text:span text:style-name="T3">| Software Engineer</text:span></text:span></text:p>
      <text:p text:style-name="P3">Santo Domingo, Dominican Republic | +1 849-359-3664 | addison.amin@gmail.com | <text:a xlink:type="simple" xlink:href="https://addisonreyes.com/" text:style-name="Internet_20_link" text:visited-style-name="Visited_20_Internet_20_Link">addisonreyes.com</text:a> | <text:a xlink:type="simple" xlink:href="https://linkedin.com/in/addison-reyes-9aa017208" text:style-name="Internet_20_link" text:visited-style-name="Visited_20_Internet_20_Link"><text:span text:style-name="T4">Linkedin</text:span></text:a> | <text:a xlink:type="simple" xlink:href="https://github.com/AddisonReyes" text:style-name="Internet_20_link" text:visited-style-name="Visited_20_Internet_20_Link">github</text:a></text:p>
      <text:p text:style-name="P4"/>
      <text:p text:style-name="P4"><text:span text:style-name="T5">S</text:span>oftware engineer focused on production-ready web applications with TypeScript, Python, <text:span text:style-name="T5">and Rust</text:span>. Experienced with <text:span text:style-name="T5">Next.js, React, </text:span>Django, FastAPI, REST APIs, authentication, data modeling, automation, BI/reporting tools, and Dockerized delivery. I also build Data/AI workflows and use Rust as a second backend language for performance-critical services where speed, reliability, and control matter.</text:p>
      <text:p text:style-name="P5"><text:line-break/>Skills</text:p>
      <text:p text:style-name="P6"><text:span text:style-name="Strong"><text:span text:style-name="T6">Programming l</text:span></text:span><text:span text:style-name="Strong"><text:span text:style-name="T7">anguages:</text:span></text:span><text:span text:style-name="T7"> Python, TypeScript, Rust</text:span></text:p>
      <text:p text:style-name="P6"><text:span text:style-name="Strong"><text:span text:style-name="T7">Frontend:</text:span></text:span><text:span text:style-name="T7"> Next.js, React, Tailwind CSS, HTML, CSS</text:span></text:p>
      <text:p text:style-name="P6"><text:span text:style-name="Strong"><text:span text:style-name="T7">Backend:</text:span></text:span><text:span text:style-name="T7"> </text:span><text:span text:style-name="T6">Node.js, </text:span><text:span text:style-name="T7">Django, FastAPI, REST APIs, OpenAPI/Swagger, async programming, backend architecture</text:span></text:p>
      <text:p text:style-name="P7"><text:span text:style-name="Strong"><text:span text:style-name="T7">Tools and infrastructure:</text:span></text:span><text:span text:style-name="T7"> Docker, Git, Linux, CI/CD basics, API integration, deployment workflows</text:span></text:p>
      <text:p text:style-name="P6"><text:span text:style-name="Strong"><text:span text:style-name="T7">Data and AI: </text:span></text:span><text:span text:style-name="Strong"><text:span text:style-name="T8">A</text:span></text:span><text:span text:style-name="T7">utomation, </text:span><text:span text:style-name="T6">n8n, AI Engineering, Codex, OpenCode, </text:span><text:span text:style-name="T7">Scikit-learn, </text:span><text:span text:style-name="T6">Pandas, Numpy</text:span></text:p>
      <text:p text:style-name="P8">Databases: <text:span text:style-name="T9">PostgreSQL, MongoDB, MySQL, NoSQL, SQL, data modeling</text:span></text:p>
      <text:p text:style-name="P5"><text:line-break/>Experience</text:p>
      <text:p text:style-name="P6"><text:span text:style-name="Strong"><text:span text:style-name="T7">SEMS, SRL | Distrito Nacional, Dominican Republic</text:span></text:span><text:span text:style-name="T7"> | May 2024 - Present</text:span></text:p>
      <text:p text:style-name="P9">Software Developer | Full-time, Hybrid</text:p>
      <text:list text:style-name="L1">
        <text:list-item>
          <text:p text:style-name="P10">Developed and customized Odoo 16 modules to automate internal business processes, including workflow extensions and feature customization across ERP operations. </text:p>
        </text:list-item>
        <text:list-item>
          <text:p text:style-name="P10">Built integrations between Odoo and internal Django-based systems to synchronize operational data and automate purchasing workflows. </text:p>
        </text:list-item>
        <text:list-item>
          <text:p text:style-name="P10">Implemented functionality that allowed material request orders created in an internal ordering application to be automatically generated as purchase workflows inside Odoo. </text:p>
        </text:list-item>
        <text:list-item>
          <text:p text:style-name="P10">Developed internal web applications using React, TypeScript, Vite, and FastAPI, including a customer price catalog management platform. </text:p>
        </text:list-item>
        <text:list-item>
          <text:p text:style-name="P10">Contributed to frontend mobile development using Flutter for internal business applications. </text:p>
        </text:list-item>
        <text:list-item>
          <text:p text:style-name="P10">Designed backend logic, APIs, and database interactions to support internal operational tools and cross-system communication. </text:p>
        </text:list-item>
        <text:list-item>
          <text:p text:style-name="P10">Collaborated with internal teams and stakeholders to translate operational requirements into software solutions and process automation tools.</text:p>
        </text:list-item>
      </text:list>
      <text:p text:style-name="P6"><text:span text:style-name="Strong"><text:span text:style-name="T7"/></text:span></text:p>
      <text:p text:style-name="P6"><text:span text:style-name="Strong"><text:span text:style-name="T7">SEMS, SRL | Distrito Nacional, Dominican Republic</text:span></text:span><text:span text:style-name="T7"> | Feb 2024 - May 2024</text:span></text:p>
      <text:p text:style-name="P11">Data Analyst | Internship, On-site</text:p>
      <text:list text:style-name="L2">
        <text:list-item>
          <text:p text:style-name="P12">Developed internal reporting and data analysis solutions to support operational visibility and business decision-making.</text:p>
        </text:list-item>
        <text:list-item>
          <text:p text:style-name="P12">Collaborated on the development of a Slack bot that delivered automated daily fuel consumption and pricing analytics reports.</text:p>
        </text:list-item>
        <text:list-item>
          <text:p text:style-name="P12">Built automated visualization workflows and reporting processes to reduce manual analysis and improve data accessibility.</text:p>
        </text:list-item>
      </text:list>
      <text:p text:style-name="P6"><text:span text:style-name="Strong"><text:span text:style-name="T7"/></text:span></text:p>
      <text:p text:style-name="P6"><text:span text:style-name="Strong"><text:span text:style-name="T7">OXSIS, SRL | Santo Domingo Este, Dominican Republic</text:span></text:span><text:span text:style-name="T7"> | Sep 2020 - Aug 2025</text:span></text:p>
      <text:p text:style-name="P11">IT Support Specialist | Part-time, Hybrid</text:p>
      <text:list text:style-name="L3">
        <text:list-item>
          <text:p text:style-name="P13">Provided technical support and troubleshooting for office hardware, printers, email accounts, and internal business systems.</text:p>
        </text:list-item>
        <text:list-item>
          <text:p text:style-name="P13">Assisted users with ADM Cloud and other operational software platforms used in logistics and customs services workflows.</text:p>
        </text:list-item>
        <text:list-item>
          <text:p text:style-name="P13">Supported accounting operations through invoice digitization, document scanning, and administrative technical assistance.</text:p>
        </text:list-item>
        <text:list-item>
          <text:p text:style-name="P13">Performed general IT maintenance and end-user support across internal company operations.</text:p>
        </text:list-item>
      </text:list>
      <text:p text:style-name="P5"/>
      <text:p text:style-name="P14"/>
      <text:p text:style-name="P5"><text:soft-page-break/>Projects</text:p>
      <text:p text:style-name="P6"><text:span text:style-name="Strong"><text:span text:style-name="T7">MiniFT - Personal Finance Tracking Application</text:span></text:span><text:span text:style-name="T7"> | </text:span><text:a xlink:type="simple" xlink:href="https://minift.net/" text:style-name="Internet_20_link" text:visited-style-name="Visited_20_Internet_20_Link"><text:span text:style-name="T10">Website</text:span></text:a><text:span text:style-name="T10"> </text:span><text:span text:style-name="T11">| </text:span><text:a xlink:type="simple" xlink:href="https://minift-backend.up.railway.app/docs/" text:style-name="Internet_20_link" text:visited-style-name="Visited_20_Internet_20_Link"><text:span text:style-name="T11">API Docs</text:span></text:a><text:span text:style-name="T11"> | </text:span><text:a xlink:type="simple" xlink:href="https://github.com/AddisonReyes/MiniFT" text:style-name="Internet_20_link" text:visited-style-name="Visited_20_Internet_20_Link"><text:span text:style-name="T11">Source code</text:span></text:a></text:p>
      <text:p text:style-name="P15"><text:span text:style-name="T7">Performance-oriented finance tracker with a Rust backend, PostgreSQL, authentication, Dockerized deployment, and a TypeScript dashboard. Designed a production-style backend with strongly typed domain logic, persistence, authentication, and deployment-ready configuration. </text:span><text:span text:style-name="Strong"><text:span text:style-name="T12">Tech:</text:span></text:span><text:span text:style-name="T12"> Rust, Rocket, PostgreSQL, TypeScript, Next.js, React, Tailwind CSS, Docker</text:span></text:p>
      <text:p text:style-name="P6"><text:span text:style-name="Strong"><text:span text:style-name="T7"><text:line-break/>AnimeSR - Recommendation and Discovery Platform</text:span></text:span><text:span text:style-name="T7"> | </text:span><text:a xlink:type="simple" xlink:href="https://animesr.pages.dev/" text:style-name="Internet_20_link" text:visited-style-name="Visited_20_Internet_20_Link"><text:span text:style-name="T10">Website</text:span></text:a><text:span text:style-name="T7"> | </text:span><text:a xlink:type="simple" xlink:href="https://animesr.up.railway.app/docs" text:style-name="Internet_20_link" text:visited-style-name="Visited_20_Internet_20_Link"><text:span text:style-name="T7">API Docs</text:span></text:a><text:span text:style-name="T7"> | </text:span><text:a xlink:type="simple" xlink:href="https://github.com/AddisonReyes/AnimeSR" text:style-name="Internet_20_link" text:visited-style-name="Visited_20_Internet_20_Link"><text:span text:style-name="T11">Source c</text:span><text:span text:style-name="T7">ode</text:span></text:a></text:p>
      <text:p text:style-name="P15"><text:span text:style-name="T7">Recommendation-oriented catalog pairing FastAPI backend filtering, search, and machine-learning-assisted discovery with a TypeScript interface. Built backend search, recommendation services, REST endpoints, and API documentation for catalog discovery. </text:span><text:span text:style-name="Strong"><text:span text:style-name="T12">Tech:</text:span></text:span><text:span text:style-name="T12"> Python, FastAPI, Scikit-learn, Next.js, React, TypeScript, Docker</text:span></text:p>
      <text:p text:style-name="P6"><text:span text:style-name="Strong"><text:span text:style-name="T7"/></text:span></text:p>
      <text:p text:style-name="P6"><text:span text:style-name="Strong"><text:span text:style-name="T7">EasyToDo – </text:span></text:span><text:span text:style-name="Strong"><text:span text:style-name="T13">Web l</text:span></text:span><text:span text:style-name="Strong"><text:span text:style-name="T7">ocal-First Productivity Application</text:span></text:span><text:span text:style-name="T7"> | </text:span><text:a xlink:type="simple" xlink:href="https://easy-to-do.pages.dev/" text:style-name="Internet_20_link" text:visited-style-name="Visited_20_Internet_20_Link"><text:span text:style-name="T10">Website</text:span></text:a><text:span text:style-name="T7"> | </text:span><text:a xlink:type="simple" xlink:href="https://github.com/AddisonReyes/easy-to-do" text:style-name="Internet_20_link" text:visited-style-name="Visited_20_Internet_20_Link"><text:span text:style-name="T11">Source c</text:span><text:span text:style-name="T7">ode</text:span></text:a></text:p>
      <text:p text:style-name="P15"><text:span text:style-name="T7">TypeScript app focused on fast state handling, clean product logic, and a minimal task and habit workflow. Implemented data handling and fast state updates for reliable task management in a distraction-free workflow. </text:span><text:span text:style-name="Strong"><text:span text:style-name="T14">Tech:</text:span></text:span><text:span text:style-name="T14"> TypeScript, Next.js, React, Tailwind CSS</text:span></text:p>
      <text:p text:style-name="P5"><text:line-break/>Education</text:p>
      <text:p text:style-name="P6"><text:span text:style-name="Strong"><text:span text:style-name="T7">UNICARIBE - </text:span></text:span><text:span text:style-name="Strong"><text:span text:style-name="T15">Engineering Degree, Software Engineering</text:span></text:span><text:span text:style-name="T7"> | </text:span><text:span text:style-name="T16">Apr 2025 – Present</text:span></text:p>
      <text:p text:style-name="P16"><text:span text:style-name="T17">TECH Global University -</text:span> <text:span text:style-name="T18">Diploma of efucation, Backend Engineering </text:span>| Oct 2025 – Nov 2025</text:p>
      <text:p text:style-name="P6"><text:span text:style-name="Strong"><text:span text:style-name="T7">ITLA - </text:span></text:span><text:span text:style-name="Strong"><text:span text:style-name="T15">Associate Degree, Artificial Intelligence</text:span></text:span><text:span text:style-name="T7"> | </text:span><text:span text:style-name="T16">Aug 2021 - Dec 2023</text:span></text:p>
      <text:p text:style-name="P17"/>
      <text:p text:style-name="P18">Courses and certifications</text:p>
      <text:p text:style-name="P19"><text:span text:style-name="T19">TALENDIG</text:span><text:span text:style-name="T20"> - </text:span><text:span text:style-name="T21">B</text:span><text:span text:style-name="T18">ootcamp, Fullstack developer</text:span> | Jul 2025 - Jan 2026</text:p>
      <text:p text:style-name="P16"><text:span text:style-name="T17">INFOTEP -</text:span><text:span text:style-name="T18"> Technical degree, Database Programming</text:span> | Jan 2024 – Dec 2024</text:p>
      <text:p text:style-name="P16"/>
      <text:p text:style-name="P20"><text:span text:style-name="T22">Completion certificates, IT credentials and certifications collected across software engineering</text:span><text:span text:style-name="T23"> </text:span><text:span text:style-name="T24">|</text:span><text:span text:style-name="T23"> </text:span><text:a xlink:type="simple" xlink:href="https://certificates-4fx.pages.dev/" text:style-name="Internet_20_link" text:visited-style-name="Visited_20_Internet_20_Link"><text:span text:style-name="T25">Certificate</text:span><text:span text:style-name="T26">s website</text:span></text:a><text:span text:style-name="T27"> </text:span></text:p>
      <text:p text:style-name="P21"/>
      <text:p text:style-name="P5">Languages</text:p>
      <text:p text:style-name="P17">Spanish - <text:span text:style-name="T28">Native</text:span> | English - <text:span text:style-name="T29">C1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es" fo:country="DO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DO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2%" fo:text-align="justify" style:justify-single-word="false"/>
      <style:text-properties fo:color="#000000" loext:opacity="100%" style:font-name="Times New Roman" fo:font-family="'Times New Roman'" fo:font-size="11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Standard" style:class="chapter">
      <style:paragraph-properties fo:margin-top="0cm" fo:margin-bottom="0.051cm" style:contextual-spacing="false" fo:text-align="center" style:justify-single-word="false"/>
      <style:text-properties fo:font-size="18pt" fo:font-weight="bold"/>
    </style:style>
    <style:style style:name="Centered" style:family="paragraph" style:parent-style-name="Standard">
      <style:paragraph-properties fo:margin-top="0cm" fo:margin-bottom="0.102cm" style:contextual-spacing="false" fo:text-align="center" style:justify-single-word="false"/>
    </style:style>
    <style:style style:name="Section" style:family="paragraph" style:parent-style-name="Standard">
      <style:paragraph-properties fo:margin-top="0.203cm" fo:margin-bottom="0.076cm" style:contextual-spacing="false" fo:text-align="left" style:justify-single-word="false" fo:padding-left="0cm" fo:padding-right="0cm" fo:padding-top="0cm" fo:padding-bottom="0.025cm" fo:border-left="none" fo:border-right="none" fo:border-top="none" fo:border-bottom="0.74pt solid #000000"/>
      <style:text-properties fo:font-weight="bold"/>
    </style:style>
    <style:style style:name="Item" style:family="paragraph" style:parent-style-name="Standard">
      <style:paragraph-properties fo:margin-top="0.051cm" fo:margin-bottom="0.025cm" style:contextual-spacing="false"/>
    </style:style>
    <style:style style:name="Bullet" style:family="paragraph" style:parent-style-name="Standard">
      <style:paragraph-properties fo:margin-left="0.457cm" fo:margin-top="0cm" fo:margin-bottom="0.025cm" style:contextual-spacing="false" fo:text-indent="-0.457cm" style:auto-text-indent="false"/>
    </style:style>
    <style:style style:name="Comment" style:family="paragraph" style:parent-style-name="Standard" style:class="extra">
      <style:paragraph-properties fo:margin-left="0.1cm" fo:margin-right="0.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Strong" style:family="text">
      <style:text-properties fo:font-weight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0.889cm" fo:margin-bottom="0.889cm" fo:margin-left="1.219cm" fo:margin-right="1.21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3.2$Linux_X86_64 LibreOffice_project/d4d5ed47b6084125f28d269a5650105d54dde034</meta:generator>
    <meta:creation-date>2026-05-18T21:12:55.552913969</meta:creation-date>
    <meta:editing-duration>PT40M52S</meta:editing-duration>
    <meta:editing-cycles>8</meta:editing-cycles>
    <dc:date>2026-05-27T12:15:32.480134978</dc:date>
    <meta:print-date>2026-05-18T21:37:21.252088211</meta:print-date>
    <meta:printed-by>Archivos PDF</meta:printed-by>
    <meta:document-statistic meta:table-count="0" meta:image-count="0" meta:object-count="0" meta:page-count="2" meta:paragraph-count="48" meta:word-count="653" meta:character-count="4893" meta:non-whitespace-character-count="4287"/>
  </office:meta>
</office:document-meta>
</file>