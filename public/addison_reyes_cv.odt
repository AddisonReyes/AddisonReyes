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itle">
      <style:paragraph-properties fo:line-height="115%"/>
      <style:text-properties officeooo:paragraph-rsid="00062049"/>
    </style:style>
    <style:style style:name="P2" style:family="paragraph" style:parent-style-name="Centere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ection"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Item">
      <style:paragraph-properties fo:line-height="100%"/>
    </style:style>
    <style:style style:name="P6" style:family="paragraph" style:parent-style-name="Item">
      <style:paragraph-properties fo:line-height="100%"/>
      <style:text-properties officeooo:paragraph-rsid="00062049"/>
    </style:style>
    <style:style style:name="P7" style:family="paragraph" style:parent-style-name="Item">
      <style:paragraph-properties fo:line-height="100%"/>
      <style:text-properties fo:font-size="10pt" fo:language="zxx" fo:country="none" fo:font-weight="bold" officeooo:rsid="00062049" officeooo:paragraph-rsid="000620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Item">
      <style:paragraph-properties fo:line-height="100%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Bullet"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Bullet">
      <style:paragraph-properties fo:line-height="100%"/>
      <style:text-properties fo:font-size="10pt" style:font-size-asian="10pt" style:font-size-complex="10pt"/>
    </style:style>
    <style:style style:name="P11" style:family="paragraph" style:parent-style-name="Item">
      <style:paragraph-properties fo:line-height="100%"/>
      <style:text-properties officeooo:paragraph-rsid="0007664f"/>
    </style:style>
    <style:style style:name="P12" style:family="paragraph" style:parent-style-name="Item"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3" style:family="text">
      <style:text-properties fo:font-size="16pt" fo:language="zxx" fo:country="none" fo:font-style="italic" officeooo:rsid="00062049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4" style:family="text">
      <style:text-properties officeooo:rsid="00062049"/>
    </style:style>
    <style:style style:name="T5" style:family="text">
      <style:text-properties fo:font-size="10pt" fo:language="zxx" fo:country="none" officeooo:rsid="00062049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normal" officeooo:rsid="0006204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font-size="10pt" fo:language="zxx" fo:country="none" officeooo:rsid="0007664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2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3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7664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dison Amin Reyes Cedano</text:span><text:span text:style-name="Strong"><text:span text:style-name="T2"> </text:span></text:span><text:span text:style-name="Strong"><text:span text:style-name="T3">| Fullstack Software Engineer</text:span></text:span></text:p>
      <text:p text:style-name="P2">Santo Domingo, Dominican Republic | +1 849-359-3664 | addison.amin@gmail.com | <text:a xlink:type="simple" xlink:href="https://addisonreyes.com/" text:style-name="Internet_20_link" text:visited-style-name="Visited_20_Internet_20_Link">addisonreyes.com</text:a> | <text:a xlink:type="simple" xlink:href="https://linkedin.com/in/addison-reyes-9aa017208" text:style-name="Internet_20_link" text:visited-style-name="Visited_20_Internet_20_Link"><text:span text:style-name="T4">Linkedin</text:span></text:a> | <text:a xlink:type="simple" xlink:href="https://github.com/AddisonReyes" text:style-name="Internet_20_link" text:visited-style-name="Visited_20_Internet_20_Link">github</text:a></text:p>
      <text:p text:style-name="P3">Fullstack software engineer focused on production-ready web applications with TypeScript frontends and Python backends. Experienced with Django, FastAPI, REST APIs, authentication, data modeling, automation, BI/reporting tools, and Dockerized delivery. I also build Data/AI workflows and use Rust as a second backend language for performance-critical services where speed, reliability, and control matter.</text:p>
      <text:p text:style-name="P4"><text:line-break/>Skills</text:p>
      <text:p text:style-name="P5"><text:span text:style-name="Strong"><text:span text:style-name="T5">Programming l</text:span></text:span><text:span text:style-name="Strong"><text:span text:style-name="T6">anguages:</text:span></text:span><text:span text:style-name="T6"> Python, TypeScript, Rust</text:span></text:p>
      <text:p text:style-name="P5"><text:span text:style-name="Strong"><text:span text:style-name="T6">Frontend:</text:span></text:span><text:span text:style-name="T6"> Next.js, React, Tailwind CSS, HTML, CSS, responsive UI</text:span></text:p>
      <text:p text:style-name="P5"><text:span text:style-name="Strong"><text:span text:style-name="T6">Backend:</text:span></text:span><text:span text:style-name="T6"> </text:span><text:span text:style-name="T5">Node.js, </text:span><text:span text:style-name="T6">Django, FastAPI, REST APIs, OpenAPI/Swagger, async programming, backend architecture</text:span></text:p>
      <text:p text:style-name="P6"><text:span text:style-name="Strong"><text:span text:style-name="T6">Tools and infrastructure:</text:span></text:span><text:span text:style-name="T6"> Docker, Git, Linux, CI/CD basics, API integration, deployment workflows</text:span></text:p>
      <text:p text:style-name="P5"><text:span text:style-name="Strong"><text:span text:style-name="T6">Data and AI: </text:span></text:span><text:span text:style-name="Strong"><text:span text:style-name="T7">A</text:span></text:span><text:span text:style-name="T6">utomation, </text:span><text:span text:style-name="T5">n8n, AI Engineering,</text:span><text:span text:style-name="T5"> Codex, OpenCode, </text:span><text:span text:style-name="T6">Scikit-learn, </text:span><text:span text:style-name="T5">Pandas, Numpy</text:span></text:p>
      <text:p text:style-name="P7">Databases: <text:span text:style-name="T8">PostgreSQL, MongoDB, MySQL, NoSQL, SQL, data modeling</text:span></text:p>
      <text:p text:style-name="P4"><text:line-break/>Experience</text:p>
      <text:p text:style-name="P5"><text:span text:style-name="Strong"><text:span text:style-name="T6">SEMS, SRL | Distrito Nacional, Dominican Republic</text:span></text:span><text:span text:style-name="T6"> | May 2024 - Present</text:span></text:p>
      <text:p text:style-name="P8">Software Developer | Full-time, Hybrid</text:p>
      <text:p text:style-name="P9">- Build Python/Django backend services, business logic, validation rules, and RESTful APIs for production operations.</text:p>
      <text:p text:style-name="P9">- Develop data exchange workflows, automation, and integrations between internal and external systems.</text:p>
      <text:p text:style-name="P9">- Design data models and optimize ORM-based access patterns for maintainability and operational performance.</text:p>
      <text:p text:style-name="P9">- Implement automated reporting and internal BI tools that improve data visibility and reduce manual work.</text:p>
      <text:p text:style-name="P10"><text:span text:style-name="T9">- Collaborate with stakeholders to turn business requirements into reliable, production-ready software.</text:span></text:p>
      <text:p text:style-name="P5"><text:span text:style-name="Strong"><text:span text:style-name="T6">SEMS, SRL | Distrito Nacional, Dominican Republic</text:span></text:span><text:span text:style-name="T6"> | Feb 2024 - May 2024</text:span></text:p>
      <text:p text:style-name="P8">Data Analyst | Internship, On-site</text:p>
      <text:p text:style-name="P9">- Developed data analysis workflows and visualization dashboards to support business decision-making.</text:p>
      <text:p text:style-name="P10"><text:span text:style-name="T9">- Automated reporting processes, reducing manual data handling and improving reporting efficiency.</text:span></text:p>
      <text:p text:style-name="P5"><text:span text:style-name="Strong"><text:span text:style-name="T6">OXSIS, SRL | Santo Domingo Este, Dominican Republic</text:span></text:span><text:span text:style-name="T6"> | Sep 2020 - Aug 2025</text:span></text:p>
      <text:p text:style-name="P8">IT Support Specialist | Part-time, Hybrid</text:p>
      <text:p text:style-name="P9">- Provided technical support, system maintenance, and troubleshooting in a logistics and customs environment.</text:p>
      <text:p text:style-name="P9">- Supported data management, internal systems, process automation initiatives, and operational reliability.</text:p>
      <text:p text:style-name="P4"><text:line-break/>Projects</text:p>
      <text:p text:style-name="P5"><text:span text:style-name="Strong"><text:span text:style-name="T6">MiniFT - Personal Finance Tracking Application</text:span></text:span><text:span text:style-name="T6"> | </text:span><text:a xlink:type="simple" xlink:href="https://minift.net/" text:style-name="Internet_20_link" text:visited-style-name="Visited_20_Internet_20_Link"><text:span text:style-name="T10">Website</text:span></text:a></text:p>
      <text:p text:style-name="P11"><text:span text:style-name="T6">Performance-oriented finance tracker with a Rust backend, PostgreSQL, authentication, Dockerized deployment, and a TypeScript dashboard. Designed a production-style backend with strongly typed domain logic, persistence, authentication, and deployment-ready configuration. </text:span><text:span text:style-name="Strong"><text:span text:style-name="T11">Tech:</text:span></text:span><text:span text:style-name="T11"> Rust, Rocket, PostgreSQL, TypeScript, Next.js, React, Tailwind CSS, Docker</text:span></text:p>
      <text:p text:style-name="P5"><text:span text:style-name="Strong"><text:span text:style-name="T6"><text:line-break/>AnimeSR - Recommendation and Discovery Platform</text:span></text:span><text:span text:style-name="T6"> | </text:span><text:a xlink:type="simple" xlink:href="https://animesr.pages.dev/" text:style-name="Internet_20_link" text:visited-style-name="Visited_20_Internet_20_Link"><text:span text:style-name="T10">Website</text:span></text:a><text:span text:style-name="T6"> | </text:span><text:a xlink:type="simple" xlink:href="https://animesr.up.railway.app/docs" text:style-name="Internet_20_link" text:visited-style-name="Visited_20_Internet_20_Link"><text:span text:style-name="T6">API Docs</text:span></text:a><text:span text:style-name="T6"> | </text:span><text:a xlink:type="simple" xlink:href="https://github.com/AddisonReyes/AnimeSR" text:style-name="Internet_20_link" text:visited-style-name="Visited_20_Internet_20_Link"><text:span text:style-name="T6">Code</text:span></text:a></text:p>
      <text:p text:style-name="P11"><text:span text:style-name="T6">Recommendation-oriented catalog pairing FastAPI backend filtering, search, and machine-learning-assisted discovery with a TypeScript interface. Built backend search, recommendation services, REST endpoints, and API documentation for catalog discovery. </text:span><text:span text:style-name="Strong"><text:span text:style-name="T11">Tech:</text:span></text:span><text:span text:style-name="T11"> Python, FastAPI, Scikit-learn, Next.js, React, TypeScript, Docker</text:span></text:p>
      <text:p text:style-name="P5"><text:span text:style-name="Strong"><text:span text:style-name="T6"/></text:span></text:p>
      <text:p text:style-name="P5"><text:span text:style-name="Strong"><text:span text:style-name="T6">EasyToDo - Local-First Productivity Application</text:span></text:span><text:span text:style-name="T6"> | </text:span><text:a xlink:type="simple" xlink:href="https://easy-to-do.pages.dev/" text:style-name="Internet_20_link" text:visited-style-name="Visited_20_Internet_20_Link"><text:span text:style-name="T10">Website</text:span></text:a><text:span text:style-name="T6"> | </text:span><text:a xlink:type="simple" xlink:href="https://github.com/AddisonReyes/easy-to-do" text:style-name="Internet_20_link" text:visited-style-name="Visited_20_Internet_20_Link"><text:span text:style-name="T6">Code</text:span></text:a></text:p>
      <text:p text:style-name="P11"><text:span text:style-name="T6">TypeScript app focused on fast state handling, clean product logic, and a minimal task and habit workflow. Implemented data handling and fast state updates for reliable task management in a distraction-free </text:span><text:span text:style-name="T6">workflow. </text:span><text:span text:style-name="Strong"><text:span text:style-name="T12">Tech:</text:span></text:span><text:span text:style-name="T12"> TypeScript, Next.js, React, Tailwind CSS</text:span></text:p>
      <text:p text:style-name="P4"><text:line-break/>Education</text:p>
      <text:p text:style-name="P5"><text:span text:style-name="Strong"><text:span text:style-name="T6">UNICARIBE - </text:span></text:span><text:span text:style-name="Strong"><text:span text:style-name="T13">Engineering Degree, Software Engineering</text:span></text:span><text:span text:style-name="T6"> | </text:span><text:span text:style-name="T14">Apr 2025 - Present</text:span></text:p>
      <text:p text:style-name="P5"><text:span text:style-name="Strong"><text:span text:style-name="T6">ITLA - </text:span></text:span><text:span text:style-name="Strong"><text:span text:style-name="T13">Associate Degree, Artificial Intelligence</text:span></text:span><text:span text:style-name="T6"> | </text:span><text:span text:style-name="T14">Aug 2021 - Dec 2023</text:span></text:p>
      <text:p text:style-name="P12"/>
      <text:p text:style-name="P4">Languages</text:p>
      <text:p text:style-name="P12">Spanish - <text:span text:style-name="T15">Native</text:span> | English - <text:span text:style-name="T16">C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2%" fo:text-align="justify" style:justify-single-word="false"/>
      <style:text-properties fo:color="#000000" loext:opacity="100%" style:font-name="Times New Roman" fo:font-family="'Times New Roman'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class="chapter">
      <style:paragraph-properties fo:margin-top="0cm" fo:margin-bottom="0.051cm" style:contextual-spacing="false" fo:text-align="center" style:justify-single-word="false"/>
      <style:text-properties fo:font-size="18pt" fo:font-weight="bold"/>
    </style:style>
    <style:style style:name="Centered" style:family="paragraph" style:parent-style-name="Standard">
      <style:paragraph-properties fo:margin-top="0cm" fo:margin-bottom="0.102cm" style:contextual-spacing="false" fo:text-align="center" style:justify-single-word="false"/>
    </style:style>
    <style:style style:name="Section" style:family="paragraph" style:parent-style-name="Standard">
      <style:paragraph-properties fo:margin-top="0.203cm" fo:margin-bottom="0.076cm" style:contextual-spacing="false" fo:text-align="left" style:justify-single-word="false" fo:padding-left="0cm" fo:padding-right="0cm" fo:padding-top="0cm" fo:padding-bottom="0.025cm" fo:border-left="none" fo:border-right="none" fo:border-top="none" fo:border-bottom="0.74pt solid #000000"/>
      <style:text-properties fo:font-weight="bold"/>
    </style:style>
    <style:style style:name="Item" style:family="paragraph" style:parent-style-name="Standard">
      <style:paragraph-properties fo:margin-top="0.051cm" fo:margin-bottom="0.025cm" style:contextual-spacing="false"/>
    </style:style>
    <style:style style:name="Bullet" style:family="paragraph" style:parent-style-name="Standard">
      <style:paragraph-properties fo:margin-left="0.457cm" fo:margin-top="0cm" fo:margin-bottom="0.025cm" style:contextual-spacing="false" fo:text-indent="-0.457cm" style:auto-text-indent="false"/>
    </style:style>
    <style:style style:name="Strong" style:family="text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89cm" fo:margin-bottom="0.889cm" fo:margin-left="1.219cm" fo:margin-right="1.2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meta:creation-date>2026-05-18T21:12:55.552913969</meta:creation-date>
    <meta:editing-duration>PT11M23S</meta:editing-duration>
    <meta:editing-cycles>4</meta:editing-cycles>
    <dc:date>2026-05-18T21:38:04.605885175</dc:date>
    <meta:print-date>2026-05-18T21:37:21.252088211</meta:print-date>
    <meta:printed-by>Archivos PDF</meta:printed-by>
    <meta:document-statistic meta:table-count="0" meta:image-count="0" meta:object-count="0" meta:page-count="1" meta:paragraph-count="38" meta:word-count="483" meta:character-count="3671" meta:non-whitespace-character-count="3221"/>
  </office:meta>
</office:document-meta>
</file>