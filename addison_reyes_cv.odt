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22c6d1" style:font-size-asian="10pt" style:font-size-complex="10pt" style:script-type="latin"/>
    </style:style>
    <style:style style:name="P18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22c6d1" style:font-size-asian="10pt" style:font-size-complex="10pt" style:script-type="latin"/>
    </style:style>
    <style:style style:name="P19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20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21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22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e30ff"/>
    </style:style>
    <style:style style:name="T8" style:family="text">
      <style:text-properties officeooo:rsid="0019a25a"/>
    </style:style>
    <style:style style:name="T9" style:family="text">
      <style:text-properties officeooo:rsid="0022c6d1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/text:p>
      <text:p text:style-name="P9">Full-stack web application for managing financial transactions, budgets, and user financial habits.<text:line-break/>Tech: Rust, <text:span text:style-name="T7">Rocket, </text:span>PostgreSQL, <text:span text:style-name="T7">TypeScript, </text:span>Next.js, React, Tailwind CSS, Docker</text:p>
      <text:list text:style-name="L4">
        <text:list-item>
          <text:p text:style-name="P15">Designed and developed a production-ready application with a modular full-stack architecture.</text:p>
        </text:list-item>
        <text:list-item>
          <text:p text:style-name="P15">Implemented backend services using Rust and PostgreSQL for data persistence and performance.</text:p>
        </text:list-item>
        <text:list-item>
          <text:p text:style-name="P15">Built responsive frontend interfaces using Next.js, React, and Tailwind CSS.</text:p>
        </text:list-item>
        <text:list-item>
          <text:p text:style-name="P15">Developed core features including transaction tracking, budgeting, and data management (CRUD operations)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Swagger UI<text:span text:style-name="T6">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8">docs</text:span></text:a><text:span text:style-name="T8"> </text:span><text:span text:style-name="T7">(API Doc)</text:span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, <text:span text:style-name="T7">TypeScript</text:span></text:p>
      <text:list text:style-name="L5">
        <text:list-item>
          <text:p text:style-name="P16">Developed a recommendation system using Python, FastAPI, and Scikit-Learn for content-based filtering.</text:p>
        </text:list-item>
        <text:list-item>
          <text:p text:style-name="P16">Designed RESTful APIs for search, recommendation, and data retrieval.</text:p>
        </text:list-item>
        <text:list-item>
          <text:p text:style-name="P16">Built frontend application using Next.js and React for interactive user experience.</text:p>
        </text:list-item>
        <text:list-item>
          <text:p text:style-name="P16">Integrated machine learning models into production-ready backend services.</text:p>
        </text:list-item>
        <text:list-item>
          <text:p text:style-name="P16">Implemented API documentation and service endpoints for external consumption.</text:p>
        </text:list-item>
      </text:list>
      <text:p text:style-name="P17"><text:span text:style-name="Strong_20_Emphasis">Library API</text:span> – A full-stack library management app<text:line-break/><text:span text:style-name="T6">Website: </text:span><text:a xlink:type="simple" xlink:href="https://next-library-api.up.railway.app/" text:style-name="Internet_20_link" text:visited-style-name="Visited_20_Internet_20_Link"><text:span text:style-name="T6">https://next-library-api.up.railway.app/</text:span></text:a><text:line-break/>Swagger UI<text:span text:style-name="T6">: </text:span><text:a xlink:type="simple" xlink:href="https://next-library-api.up.railway.app/api-docs" text:style-name="Internet_20_link" text:visited-style-name="Visited_20_Internet_20_Link"><text:span text:style-name="T6">https://next-library-api.up.railway.app/</text:span><text:span text:style-name="T9">api-docs</text:span></text:a><text:span text:style-name="T9"><text:line-break/></text:span><text:span text:style-name="T6">Code: </text:span><text:a xlink:type="simple" xlink:href="https://github.com/AddisonReyes/library-api" text:style-name="Internet_20_link" text:visited-style-name="Visited_20_Internet_20_Link"><text:span text:style-name="T6">https://github.com/AddisonReyes/library-api</text:span></text:a></text:p>
      <text:p text:style-name="P17">Full-stack web application focused on library management.<text:line-break/>Tech: <text:span text:style-name="T7">TypeScript, </text:span><text:span text:style-name="T9">Next.js, React, Tailwind CSS, Express, Node.js, MongoDB, Docker</text:span></text:p>
      <text:list text:continue-numbering="true" text:style-name="L5">
        <text:list-item>
          <text:p text:style-name="P18">It includes a public landing page, a protected workspace, internal API routes, bilingual UI, persistent theme preferences, and Swagger-based API documentation.</text:p>
        </text:list-item>
      </text:list>
      <text:p text:style-name="P9"><text:span text:style-name="Strong_20_Emphasis"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<text:span text:style-name="T7">TypeScript, </text:span>Next.js, React, Tailwind CSS</text:p>
      <text:list text:style-name="L6">
        <text:list-item>
          <text:p text:style-name="P19">Implemented local-first data handling for fast and reliable task management.</text:p>
        </text:list-item>
        <text:list-item>
          <text:p text:style-name="P20">Designed minimal UI/UX for distraction-free productivity workflows.</text:p>
        </text:list-item>
      </text:list>
      <text:h text:style-name="P21" text:outline-level="3"><text:span text:style-name="Strong_20_Emphasis"><text:line-break/>EDUCATION</text:span></text:h>
      <text:p text:style-name="P22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10">Associate's Degree, Artificial Intelligence<text:line-break/>Aug 2021 - Dec 2023</text:span></text:span></text:p>
      <text:p text:style-name="P7"><text:span text:style-name="Strong_20_Emphasis"><text:line-break/>LANGUAGES</text:span></text:p>
      <text:p text:style-name="P22"><text:span text:style-name="Strong_20_Emphasis">Spanish - </text:span><text:span text:style-name="Strong_20_Emphasis"><text:span text:style-name="T10">Native</text:span></text:span><text:span text:style-name="Strong_20_Emphasis"><text:line-break/>English - </text:span><text:span text:style-name="Strong_20_Emphasis"><text:span text:style-name="T10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3T00:39:28.060150204</dc:date>
    <meta:editing-duration>PT2H38M6S</meta:editing-duration>
    <meta:editing-cycles>25</meta:editing-cycles>
    <meta:generator>LibreOffice/26.2.3.2$Linux_X86_64 LibreOffice_project/d4d5ed47b6084125f28d269a5650105d54dde034</meta:generator>
    <meta:print-date>2026-04-14T22:20:52.670128507</meta:print-date>
    <meta:printed-by>Archivos PDF</meta:printed-by>
    <meta:document-statistic meta:table-count="0" meta:image-count="0" meta:object-count="0" meta:page-count="2" meta:paragraph-count="52" meta:word-count="633" meta:character-count="5187" meta:non-whitespace-character-count="4627"/>
  </office:meta>
</office:document-meta>
</file>