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star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star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start" style:justify-single-word="false"/>
      <style:text-properties officeooo:paragraph-rsid="00188f3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19" style:family="paragraph" style:parent-style-name="Heading_20_3">
      <style:paragraph-properties fo:text-align="star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e30ff"/>
    </style:style>
    <style:style style:name="T8" style:family="text">
      <style:text-properties officeooo:rsid="0019a25a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text:line-break/>Swagger UI<text:span text:style-name="T6">: </text:span><text:a xlink:type="simple" xlink:href="https://minift-backend.up.railway.app/docs/" text:style-name="Internet_20_link" text:visited-style-name="Visited_20_Internet_20_Link">https://minift-backend.up.railway.app/docs/</text:a> <text:span text:style-name="T7">(API Doc)</text:span><text:line-break/><text:span text:style-name="T6">Code: </text:span><text:a xlink:type="simple" xlink:href="https://github.com/AddisonReyes/MiniFT" text:style-name="Internet_20_link" text:visited-style-name="Visited_20_Internet_20_Link">https://github.com/AddisonReyes/MiniFT</text:a></text:p>
      <text:p text:style-name="P9">Full-stack web application for managing financial transactions, budgets, and user financial habits.<text:line-break/>Tech: Rust, <text:span text:style-name="T7">Rocket, </text:span>PostgreSQL, <text:span text:style-name="T7">TypeScript, </text:span>Next.js, React, Tailwind CSS, Docker</text:p>
      <text:list text:style-name="L4">
        <text:list-item>
          <text:p text:style-name="P15">Designed and developed a production-ready application with a modular full-stack architecture.</text:p>
        </text:list-item>
        <text:list-item>
          <text:p text:style-name="P15">Implemented backend services using Rust and PostgreSQL for data persistence and performance.</text:p>
        </text:list-item>
        <text:list-item>
          <text:p text:style-name="P15">Built responsive frontend interfaces using Next.js, React, and Tailwind CSS.</text:p>
        </text:list-item>
        <text:list-item>
          <text:p text:style-name="P15">Developed core features including transaction tracking, budgeting, and data management (CRUD operations).</text:p>
        </text:list-item>
        <text:list-item>
          <text:p text:style-name="P15">Containerized the application using Docker for consistent deployment environments.</text:p>
        </text:list-item>
      </text:list>
      <text:p text:style-name="P9"><text:span text:style-name="Strong_20_Emphasis"/></text:p>
      <text:p text:style-name="P14"><text:span text:style-name="Strong_20_Emphasis"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Swagger UI<text:span text:style-name="T6">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8">docs</text:span></text:a><text:span text:style-name="T8"> </text:span><text:span text:style-name="T7">(API Doc)</text:span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, <text:span text:style-name="T7">TypeScript</text:span></text:p>
      <text:list text:style-name="L5">
        <text:list-item>
          <text:p text:style-name="P16">Developed a recommendation system using Python, FastAPI, and Scikit-Learn for content-based filtering.</text:p>
        </text:list-item>
        <text:list-item>
          <text:p text:style-name="P16">Designed RESTful APIs for search, recommendation, and data retrieval.</text:p>
        </text:list-item>
        <text:list-item>
          <text:p text:style-name="P16">Built frontend application using Next.js and React for interactive user experience.</text:p>
        </text:list-item>
        <text:list-item>
          <text:p text:style-name="P16">Integrated machine learning models into production-ready backend services.</text:p>
        </text:list-item>
        <text:list-item>
          <text:p text:style-name="P16">Implemented API documentation and service endpoints for external consumption.</text:p>
        </text:list-item>
      </text:list>
      <text:p text:style-name="P9"><text:span text:style-name="Strong_20_Emphasis"/></text:p>
      <text:p text:style-name="P9"><text:span text:style-name="Strong_20_Emphasis"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<text:span text:style-name="T7">TypeScript, </text:span>Next.js, React, Tailwind CSS</text:p>
      <text:list text:style-name="L6">
        <text:list-item>
          <text:p text:style-name="P17">Developed a frontend-focused application using React, Next.js, and Tailwind CSS.</text:p>
        </text:list-item>
        <text:list-item>
          <text:p text:style-name="P17">Implemented local-first data handling for fast and reliable task management.</text:p>
        </text:list-item>
        <text:list-item>
          <text:p text:style-name="P18">Designed minimal UI/UX for distraction-free productivity workflows.</text:p>
        </text:list-item>
      </text:list>
      <text:h text:style-name="P19" text:outline-level="3"><text:span text:style-name="Strong_20_Emphasis"><text:line-break/>EDUCATION</text:span></text:h>
      <text:p text:style-name="P20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9">Associate's Degree, Artificial Intelligence<text:line-break/>Aug 2021 - Dec 2023</text:span></text:span></text:p>
      <text:p text:style-name="P7"><text:span text:style-name="Strong_20_Emphasis"><text:span text:style-name="T9"/></text:span></text:p>
      <text:p text:style-name="P7"><text:span text:style-name="Strong_20_Emphasis">LANGUAGES</text:span></text:p>
      <text:p text:style-name="P20"><text:span text:style-name="Strong_20_Emphasis">Spanish - </text:span><text:span text:style-name="Strong_20_Emphasis"><text:span text:style-name="T9">Native</text:span></text:span><text:span text:style-name="Strong_20_Emphasis"><text:line-break/>English - </text:span><text:span text:style-name="Strong_20_Emphasis"><text:span text:style-name="T9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06T20:26:14.607152883</dc:date>
    <meta:editing-duration>PT2H24M29S</meta:editing-duration>
    <meta:editing-cycles>23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2" meta:paragraph-count="50" meta:word-count="598" meta:character-count="4869" meta:non-whitespace-character-count="4344"/>
  </office:meta>
</office:document-meta>
</file>