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286055" style:font-size-asian="10pt" style:font-size-complex="10pt" style:script-type="latin"/>
    </style:style>
    <style:style style:name="P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1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P20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272575"/>
    </style:style>
    <style:style style:name="T7" style:family="text">
      <style:text-properties officeooo:rsid="0028605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6055" style:font-weight-asian="normal" style:font-weight-complex="normal"/>
    </style:style>
    <style:style style:name="T10" style:family="text">
      <style:text-properties fo:font-weight="normal" officeooo:rsid="00262236" style:font-weight-asian="normal" style:font-weight-complex="normal"/>
    </style:style>
    <style:style style:name="T11" style:family="text">
      <style:text-properties officeooo:rsid="00188f31"/>
    </style:style>
    <style:style style:name="T12" style:family="text">
      <style:text-properties officeooo:rsid="001e30ff"/>
    </style:style>
    <style:style style:name="T13" style:family="text">
      <style:text-properties officeooo:rsid="0019a25a"/>
    </style:style>
    <style:style style:name="T14" style:family="text">
      <style:text-properties officeooo:rsid="00232b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Backend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Backend engineer focused on building reliable backend services, clear domain logic, and <text:span text:style-name="T6">robust</text:span> systems. Experienced with <text:span text:style-name="T7">Python, </text:span>TypeScript and Rust, specializing in API development, authentication, data modeling, backend architecture, tooling, and performance-oriented implementation. I care about writing maintainable software that is practical, scalable, and pleasant to use. 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 </text:span><text:span text:style-name="Strong_20_Emphasis"><text:span text:style-name="T8">Python, TypeScript, Rust</text:span></text:span></text:p>
      <text:p text:style-name="P6"><text:span text:style-name="Strong_20_Emphasis">Backend: </text:span><text:span text:style-name="Strong_20_Emphasis"><text:span text:style-name="T9">D</text:span></text:span><text:span text:style-name="Strong_20_Emphasis"><text:span text:style-name="T9">jango, FastAPI</text:span></text:span><text:span text:style-name="Strong_20_Emphasis"><text:span text:style-name="T10">, </text:span></text:span><text:span text:style-name="Strong_20_Emphasis"><text:span text:style-name="T8">REST APIs, Authentication, OpenAPI/Swagger, Async Programming</text:span></text:span></text:p>
      <text:p text:style-name="P6"><text:span text:style-name="Strong_20_Emphasis">Databases: </text:span><text:span text:style-name="Strong_20_Emphasis"><text:span text:style-name="T8">PostgreSQL, MongoDB, SQL, Data Modeling, ORM/ODM Tools</text:span></text:span></text:p>
      <text:p text:style-name="P6"><text:span text:style-name="Strong_20_Emphasis">Tools &amp; Infrastructure: </text:span><text:span text:style-name="Strong_20_Emphasis"><text:span text:style-name="T8">Docker, Git, Linux, CI/CD Basics, API Integration, Automation</text:span></text:span></text:p>
      <text:p text:style-name="P6"><text:span text:style-name="Strong_20_Emphasis">Software Engineering: </text:span><text:span text:style-name="Strong_20_Emphasis"><text:span text:style-name="T8">Backend Architecture, System Design, Scalable Services, Performance Optimization</text:span></text:span>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11">Website: </text:span><text:a xlink:type="simple" xlink:href="https://minift.net/" text:style-name="Internet_20_link" text:visited-style-name="Visited_20_Internet_20_Link">https://minift.net/</text:a></text:p>
      <text:p text:style-name="P9">Finance tracker built around a Rust backend, PostgreSQL data modeling, authentication, containerized deployment, and a TypeScript interface for managing transactions, budgets, and financial habits.<text:line-break/>Tech: Rust, <text:span text:style-name="T12">Rocket, </text:span>PostgreSQL, <text:span text:style-name="T12">TypeScript, </text:span>Next.js, React, Tailwind CSS, Docker</text:p>
      <text:list text:style-name="L4">
        <text:list-item>
          <text:p text:style-name="P15">Designed and developed a production-ready application centered on Rust backend services, PostgreSQL persistence, authentication, and maintainable domain logic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<text:line-break/>AnimeSR</text:span> - Anime Recommendation &amp; Discovery Platform<text:line-break/><text:span text:style-name="T11">Website: </text:span><text:a xlink:type="simple" xlink:href="https://animesr.pages.dev/" text:style-name="Internet_20_link" text:visited-style-name="Visited_20_Internet_20_Link">https://animesr.pages.dev/</text:a><text:line-break/>Swagger UI<text:span text:style-name="T11">: </text:span><text:a xlink:type="simple" xlink:href="https://animesr.up.railway.app/docs" text:style-name="Internet_20_link" text:visited-style-name="Visited_20_Internet_20_Link"><text:span text:style-name="T11">https://animesr.up.railway.app/</text:span><text:span text:style-name="T13">docs</text:span></text:a><text:span text:style-name="T13"> </text:span><text:span text:style-name="T12">(API Doc)</text:span><text:line-break/><text:span text:style-name="T11">Code: </text:span><text:a xlink:type="simple" xlink:href="https://github.com/AddisonReyes/AnimeSR" text:style-name="Internet_20_link" text:visited-style-name="Visited_20_Internet_20_Link"><text:span text:style-name="T11">https://github.com/AddisonReyes/AnimeSR</text:span></text:a></text:p>
      <text:p text:style-name="P9">Recommendation-oriented catalog pairing backend filtering and search logic with a TypeScript interface for anime discovery.<text:line-break/>Tech: FastAPI, Scikit-Learn, Next.js, React, <text:span text:style-name="T12">TypeScript, </text:span><text:span text:style-name="T14">Docker</text:span></text:p>
      <text:list text:style-name="L5">
        <text:list-item>
          <text:p text:style-name="P16">Developed backend search and recommendation services with FastAPI and Scikit-Learn for content-based filtering, plus RESTful APIs for catalog discovery and data retrieval.</text:p>
        </text:list-item>
        <text:list-item>
          <text:p text:style-name="P16">Integrated recommendation logic into backend services and implemented API documentation and endpoints for external consumption.</text:p>
        </text:list-item>
      </text:list>
      <text:p text:style-name="P9"><text:span text:style-name="Strong_20_Emphasis"><text:line-break/>EasyToDo</text:span> - Local-First Productivity Application<text:line-break/><text:span text:style-name="T11">Website: </text:span><text:a xlink:type="simple" xlink:href="https://easy-to-do.pages.dev/" text:style-name="Internet_20_link" text:visited-style-name="Visited_20_Internet_20_Link">https://easy-to-do.pages.dev/</text:a><text:line-break/><text:span text:style-name="T11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ocal-first TypeScript app focused on fast state handling, clean product logic, and a deliberately minimal task and habit workflow.<text:line-break/>Tech: <text:span text:style-name="T12">TypeScript, </text:span>Next.js, React, Tailwind CSS</text:p>
      <text:list text:style-name="L6">
        <text:list-item>
          <text:p text:style-name="P17">Implemented local-first data handling and fast state updates for reliable task management in a distraction-free workflow.</text:p>
        </text:list-item>
      </text:list>
      <text:h text:style-name="P18" text:outline-level="3"><text:span text:style-name="Strong_20_Emphasis"><text:line-break/>EDUCATION</text:span></text:h>
      <text:p text:style-name="P19"><text:span text:style-name="Strong_20_Emphasis">UNICARIBE</text:span> - Engineer's Degree, Software Engineering<text:line-break/>Apr 2025 - Present</text:p>
      <text:p text:style-name="P20"><text:span text:style-name="Strong_20_Emphasis">ITLA - </text:span><text:span text:style-name="Strong_20_Emphasis"><text:span text:style-name="T8">Associate's Degree, Artificial Intelligence<text:line-break/>Aug 2021 - Dec 2023</text:span></text:span></text:p>
      <text:p text:style-name="P20"><text:span text:style-name="Strong_20_Emphasis"><text:line-break/>LANGUAGES</text:span></text:p>
      <text:p text:style-name="P19"><text:span text:style-name="Strong_20_Emphasis">Spanish - </text:span><text:span text:style-name="Strong_20_Emphasis"><text:span text:style-name="T8">Native</text:span></text:span><text:span text:style-name="Strong_20_Emphasis"><text:line-break/>English - </text:span><text:span text:style-name="Strong_20_Emphasis"><text:span text:style-name="T8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7T17:01:39.273903485</dc:date>
    <meta:editing-duration>PT2H51M4S</meta:editing-duration>
    <meta:editing-cycles>30</meta:editing-cycles>
    <meta:generator>LibreOffice/26.2.3.2$Linux_X86_64 LibreOffice_project/d4d5ed47b6084125f28d269a5650105d54dde034</meta:generator>
    <meta:print-date>2026-05-16T18:58:06.549815842</meta:print-date>
    <meta:printed-by>Archivos PDF</meta:printed-by>
    <meta:document-statistic meta:table-count="0" meta:image-count="0" meta:object-count="0" meta:page-count="2" meta:paragraph-count="46" meta:word-count="555" meta:character-count="4526" meta:non-whitespace-character-count="4026"/>
  </office:meta>
</office:document-meta>
</file>