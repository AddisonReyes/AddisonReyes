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star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star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start" style:justify-single-word="false"/>
      <style:text-properties officeooo:paragraph-rsid="00188f31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8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9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0" style:family="paragraph" style:parent-style-name="Text_20_body" style:list-style-name="L1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2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 style:list-style-name="L3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3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b38ad" style:font-size-asian="10pt" style:font-size-complex="10pt" style:script-type="latin"/>
    </style:style>
    <style:style style:name="P14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e30ff" style:font-size-asian="10pt" style:font-size-complex="10pt" style:script-type="latin"/>
    </style:style>
    <style:style style:name="P15" style:family="paragraph" style:parent-style-name="Text_20_body" style:list-style-name="L4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6" style:family="paragraph" style:parent-style-name="Text_20_body" style:list-style-name="L5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Text_20_body" style:list-style-name="L6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8" style:family="paragraph" style:parent-style-name="Text_20_body" style:list-style-name="L6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19" style:family="paragraph" style:parent-style-name="Heading_20_3">
      <style:paragraph-properties fo:text-align="star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20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3" style:family="text">
      <style:text-properties fo:font-size="10pt" fo:language="en" fo:country="US" style:font-size-asian="10pt" style:font-size-complex="10pt" style:script-type="latin"/>
    </style:style>
    <style:style style:name="T4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5" style:family="text">
      <style:text-properties fo:font-size="10pt" fo:language="en" fo:country="US" officeooo:rsid="000088d3" style:font-size-asian="10pt" style:font-size-complex="10pt" style:script-type="latin"/>
    </style:style>
    <style:style style:name="T6" style:family="text">
      <style:text-properties officeooo:rsid="00188f31"/>
    </style:style>
    <style:style style:name="T7" style:family="text">
      <style:text-properties officeooo:rsid="001e30ff"/>
    </style:style>
    <style:style style:name="T8" style:family="text">
      <style:text-properties officeooo:rsid="0019a25a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Software Engineer</text:p>
      <text:p text:style-name="P2"/>
      <text:p text:style-name="P2"><text:span text:style-name="T1">Location:</text:span> Santo Domingo Este, Dominican Republic</text:p>
      <text:p text:style-name="P2"><text:span text:style-name="T1">Phone:</text:span> +1 849-359-3664</text:p>
      <text:p text:style-name="P3"><text:span text:style-name="T2">Email:</text:span><text:span text:style-name="T3"> </text:span><text:a xlink:type="simple" xlink:href="mailto:addison.amin@gmail.com" text:style-name="Internet_20_link" text:visited-style-name="Visited_20_Internet_20_Link"><text:span text:style-name="T3">addison.amin@gmail.com</text:span></text:a></text:p>
      <text:p text:style-name="P3"><text:span text:style-name="T2">Website:</text:span><text:span text:style-name="T3"> </text:span><text:a xlink:type="simple" xlink:href="https://addisonreyes.com/" text:style-name="Internet_20_link" text:visited-style-name="Visited_20_Internet_20_Link"><text:span text:style-name="T3">https://addisonreyes.com</text:span></text:a></text:p>
      <text:p text:style-name="P3"><text:span text:style-name="T2">LinkedIn:</text:span><text:span text:style-name="T3"> </text:span><text:a xlink:type="simple" xlink:href="https://www.linkedin.com/in/addison-reyes-9aa017208/" text:style-name="Internet_20_link" text:visited-style-name="Visited_20_Internet_20_Link"><text:span text:style-name="T3">https://www.linkedin.com/in/addison-reyes-9aa017208/</text:span></text:a></text:p>
      <text:p text:style-name="P4"><text:span text:style-name="T4">GitHub:</text:span><text:span text:style-name="T5"> </text:span><text:a xlink:type="simple" xlink:href="https://github.com/AddisonReyes" text:style-name="Internet_20_link" text:visited-style-name="Visited_20_Internet_20_Link"><text:span text:style-name="T5">https://github.com/AddisonReyes</text:span></text:a></text:p>
      <text:p text:style-name="P5"/>
      <text:p text:style-name="P6">Software Engineer specializing in full-stack web development, backend systems, and API design. Experienced in building scalable, production-ready applications across frontend, backend, and database layers, with a strong focus on system design, maintainability, and performance. Proven ability to translate business requirements into reliable software solutions and end-to-end digital products.</text:p>
      <text:p text:style-name="P6"><text:span text:style-name="Strong_20_Emphasis"/></text:p>
      <text:p text:style-name="P6"><text:span text:style-name="Strong_20_Emphasis">SKILLS</text:span></text:p>
      <text:p text:style-name="P7"><text:span text:style-name="Strong_20_Emphasis">Languages:</text:span> Rust, TypeScript, Python<text:line-break/><text:span text:style-name="Strong_20_Emphasis">Backend: </text:span>Node.js, Express, Django, FastAPI, OpenAPI/Swagger<text:line-break/><text:span text:style-name="Strong_20_Emphasis">Databases:</text:span> PostgreSQL, <text:span text:style-name="T6">MongoDB, </text:span>Data Modeling, ORMs<text:line-break/><text:span text:style-name="Strong_20_Emphasis">Frontend:</text:span> React, Next.js, Tailwind CSS, <text:span text:style-name="T6">HTML, CSS</text:span><text:line-break/><text:span text:style-name="T1">Tools &amp; Technologies</text:span>: Docker, Git, API Integration, Automation, Linux<text:span text:style-name="T6"><text:line-break/></text:span><text:span text:style-name="T1">Concepts</text:span>: REST APIs, System Design, Software Architecture, Data Processing</text:p>
      <text:p text:style-name="P8"><text:span text:style-name="Strong_20_Emphasis"/></text:p>
      <text:p text:style-name="P8"><text:span text:style-name="Strong_20_Emphasis">EXPERIENCE</text:span></text:p>
      <text:p text:style-name="P9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10">Designed and implemented backend services and business logic supporting core company operations, handling complex workflows and validation rules.</text:p>
        </text:list-item>
        <text:list-item>
          <text:p text:style-name="P10">Developed and maintained RESTful APIs for system interoperability and integration with internal and external applications.</text:p>
        </text:list-item>
        <text:list-item>
          <text:p text:style-name="P10">Built backend systems using Django to enable data exchange, automation, and service integration.</text:p>
        </text:list-item>
        <text:list-item>
          <text:p text:style-name="P10">Designed scalable data models and optimized ORM-based data access patterns for performance and maintainability.</text:p>
        </text:list-item>
        <text:list-item>
          <text:p text:style-name="P10">Implemented automated reporting systems and internal business intelligence tools, improving data accessibility and operational visibility.</text:p>
        </text:list-item>
        <text:list-item>
          <text:p text:style-name="P10">Collaborated with cross-functional stakeholders to gather requirements and deliver scalable, production-ready software solutions.</text:p>
        </text:list-item>
      </text:list>
      <text:p text:style-name="P9"><text:span text:style-name="Strong_20_Emphasis"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1">Developed data analysis workflows and visualization dashboards to support business decision-making.</text:p>
        </text:list-item>
        <text:list-item>
          <text:p text:style-name="P11">Automated reporting processes, reducing manual data handling and improving reporting efficiency.</text:p>
        </text:list-item>
      </text:list>
      <text:p text:style-name="P9"><text:span text:style-name="Strong_20_Emphasis"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2">Provided technical support, system maintenance, and troubleshooting in a logistics and customs environment.</text:p>
        </text:list-item>
        <text:list-item>
          <text:p text:style-name="P12">Assisted in data management, internal systems support, and process automation initiatives.</text:p>
        </text:list-item>
        <text:list-item>
          <text:p text:style-name="P12">Supported operational continuity by resolving technical issues and improving system reliability.</text:p>
        </text:list-item>
      </text:list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8"><text:soft-page-break/><text:span text:style-name="Strong_20_Emphasis">PROJECTS</text:span></text:p>
      <text:p text:style-name="P14"><text:span text:style-name="Strong_20_Emphasis">MiniFT</text:span> - Personal Finance Tracking Application<text:line-break/><text:span text:style-name="T6">Website: </text:span><text:a xlink:type="simple" xlink:href="https://minift.net/" text:style-name="Internet_20_link" text:visited-style-name="Visited_20_Internet_20_Link">https://minift.net/</text:a></text:p>
      <text:p text:style-name="P9">Full-stack web application for managing financial transactions, budgets, and user financial habits.<text:line-break/>Tech: Rust, <text:span text:style-name="T7">Rocket, </text:span>PostgreSQL, <text:span text:style-name="T7">TypeScript, </text:span>Next.js, React, Tailwind CSS, Docker</text:p>
      <text:list text:style-name="L4">
        <text:list-item>
          <text:p text:style-name="P15">Designed and developed a production-ready application with a modular full-stack architecture.</text:p>
        </text:list-item>
        <text:list-item>
          <text:p text:style-name="P15">Implemented backend services using Rust and PostgreSQL for data persistence and performance.</text:p>
        </text:list-item>
        <text:list-item>
          <text:p text:style-name="P15">Built responsive frontend interfaces using Next.js, React, and Tailwind CSS.</text:p>
        </text:list-item>
        <text:list-item>
          <text:p text:style-name="P15">Developed core features including transaction tracking, budgeting, and data management (CRUD operations).</text:p>
        </text:list-item>
        <text:list-item>
          <text:p text:style-name="P15">Containerized the application using Docker for consistent deployment environments.</text:p>
        </text:list-item>
      </text:list>
      <text:p text:style-name="P9"><text:span text:style-name="Strong_20_Emphasis"/></text:p>
      <text:p text:style-name="P14"><text:span text:style-name="Strong_20_Emphasis">AnimeSR</text:span> - Anime Recommendation &amp; Discovery Platform<text:line-break/><text:span text:style-name="T6">Website: </text:span><text:a xlink:type="simple" xlink:href="https://animesr.pages.dev/" text:style-name="Internet_20_link" text:visited-style-name="Visited_20_Internet_20_Link">https://animesr.pages.dev/</text:a><text:line-break/>Swagger UI<text:span text:style-name="T6">: </text:span><text:a xlink:type="simple" xlink:href="https://animesr.up.railway.app/docs" text:style-name="Internet_20_link" text:visited-style-name="Visited_20_Internet_20_Link"><text:span text:style-name="T6">https://animesr.up.railway.app/</text:span><text:span text:style-name="T8">docs</text:span></text:a><text:span text:style-name="T8"> </text:span><text:span text:style-name="T7">(API Doc)</text:span><text:line-break/><text:span text:style-name="T6">Code: </text:span><text:a xlink:type="simple" xlink:href="https://github.com/AddisonReyes/AnimeSR" text:style-name="Internet_20_link" text:visited-style-name="Visited_20_Internet_20_Link"><text:span text:style-name="T6">https://github.com/AddisonReyes/AnimeSR</text:span></text:a></text:p>
      <text:p text:style-name="P9">Full-stack web application focused on fast search and content-based recommendation systems.<text:line-break/>Tech: Python, FastAPI, Scikit-Learn, Next.js, React, <text:span text:style-name="T7">TypeScript</text:span></text:p>
      <text:list text:style-name="L5">
        <text:list-item>
          <text:p text:style-name="P16">Developed a recommendation system using Python, FastAPI, and Scikit-Learn for content-based filtering.</text:p>
        </text:list-item>
        <text:list-item>
          <text:p text:style-name="P16">Designed RESTful APIs for search, recommendation, and data retrieval.</text:p>
        </text:list-item>
        <text:list-item>
          <text:p text:style-name="P16">Built frontend application using Next.js and React for interactive user experience.</text:p>
        </text:list-item>
        <text:list-item>
          <text:p text:style-name="P16">Integrated machine learning models into production-ready backend services.</text:p>
        </text:list-item>
        <text:list-item>
          <text:p text:style-name="P16">Implemented API documentation and service endpoints for external consumption.</text:p>
        </text:list-item>
      </text:list>
      <text:p text:style-name="P9"><text:span text:style-name="Strong_20_Emphasis"/></text:p>
      <text:p text:style-name="P9"><text:span text:style-name="Strong_20_Emphasis">EasyToDo</text:span> - Local-First Productivity Application<text:line-break/><text:span text:style-name="T6">Website: </text:span><text:a xlink:type="simple" xlink:href="https://easy-to-do.pages.dev/" text:style-name="Internet_20_link" text:visited-style-name="Visited_20_Internet_20_Link">https://easy-to-do.pages.dev/</text:a><text:line-break/><text:span text:style-name="T6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9">Lightweight task and habit management application with a focus on simplicity and usability.<text:line-break/>Tech: <text:span text:style-name="T7">TypeScript, </text:span>Next.js, React, Tailwind CSS</text:p>
      <text:list text:style-name="L6">
        <text:list-item>
          <text:p text:style-name="P17">Developed a frontend-focused application using React, Next.js, and Tailwind CSS.</text:p>
        </text:list-item>
        <text:list-item>
          <text:p text:style-name="P17">Implemented local-first data handling for fast and reliable task management.</text:p>
        </text:list-item>
        <text:list-item>
          <text:p text:style-name="P18">Designed minimal UI/UX for distraction-free productivity workflows.</text:p>
        </text:list-item>
      </text:list>
      <text:h text:style-name="P19" text:outline-level="3"><text:span text:style-name="Strong_20_Emphasis"><text:line-break/>EDUCATION</text:span></text:h>
      <text:p text:style-name="P20"><text:span text:style-name="Strong_20_Emphasis">UNICARIBE</text:span> - Engineer's Degree, Software Engineering<text:line-break/>Apr 2025 - Present</text:p>
      <text:p text:style-name="P7"><text:span text:style-name="Strong_20_Emphasis">ITLA - </text:span><text:span text:style-name="Strong_20_Emphasis"><text:span text:style-name="T9">Associate's Degree, Artificial Intelligence<text:line-break/>Aug 2021 - Dec 2023</text:span></text:span></text:p>
      <text:p text:style-name="P7"><text:span text:style-name="Strong_20_Emphasis"><text:span text:style-name="T9"/></text:span></text:p>
      <text:p text:style-name="P7"><text:span text:style-name="Strong_20_Emphasis">LANGUAGES</text:span></text:p>
      <text:p text:style-name="P20"><text:span text:style-name="Strong_20_Emphasis">Spanish - </text:span><text:span text:style-name="Strong_20_Emphasis"><text:span text:style-name="T9">Native</text:span></text:span><text:span text:style-name="Strong_20_Emphasis"><text:line-break/>English - </text:span><text:span text:style-name="Strong_20_Emphasis"><text:span text:style-name="T9">B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10T22:57:47.756140590</dc:date>
    <meta:editing-duration>PT2H28M14S</meta:editing-duration>
    <meta:editing-cycles>24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2" meta:paragraph-count="50" meta:word-count="591" meta:character-count="4758" meta:non-whitespace-character-count="4240"/>
  </office:meta>
</office:document-meta>
</file>