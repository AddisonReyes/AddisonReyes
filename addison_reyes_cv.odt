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left" style:justify-single-word="false"/>
      <style:text-properties style:font-name="Liberation Serif" fo:font-size="16pt" fo:language="en" fo:country="US" fo:font-weight="bold" officeooo:rsid="000088d3" officeooo:paragraph-rsid="001871a3" style:font-size-asian="16pt" style:font-weight-asian="bold" style:font-size-complex="16pt" style:font-weight-complex="bold" style:script-type="latin"/>
    </style:style>
    <style:style style:name="P2" style:family="paragraph" style:parent-style-name="Standard">
      <style:paragraph-properties fo:text-align="left" style:justify-single-word="false"/>
      <style:text-properties fo:font-size="10pt" fo:language="en" fo:country="US" officeooo:rsid="000088d3" officeooo:paragraph-rsid="00188f31" style:font-size-asian="10pt" style:font-size-complex="10pt" style:script-type="latin"/>
    </style:style>
    <style:style style:name="P3" style:family="paragraph" style:parent-style-name="Standard">
      <style:paragraph-properties fo:text-align="left" style:justify-single-word="false"/>
      <style:text-properties officeooo:rsid="000088d3" officeooo:paragraph-rsid="00188f31"/>
    </style:style>
    <style:style style:name="P4" style:family="paragraph" style:parent-style-name="Standard">
      <style:paragraph-properties fo:text-align="left" style:justify-single-word="false"/>
      <style:text-properties officeooo:paragraph-rsid="00188f31"/>
    </style:style>
    <style:style style:name="P5" style:family="paragraph" style:parent-style-name="Standard">
      <style:paragraph-properties fo:text-align="left" style:justify-single-word="false"/>
      <style:text-properties fo:font-variant="normal" fo:text-transform="none" style:text-line-through-style="none" style:text-line-through-type="none" style:font-name="Liberation Serif" fo:font-size="10pt" fo:language="en" fo:country="US" fo:font-style="normal" style:text-underline-style="none" fo:font-weight="normal" officeooo:rsid="000088d3" officeooo:paragraph-rsid="00188f31" style:text-blinking="false" fo:background-color="transparent" style:font-size-asian="10pt" style:font-size-complex="10pt" style:script-type="latin"/>
    </style:style>
    <style:style style:name="P6" style:family="paragraph" style:parent-style-name="Text_20_body">
      <style:paragraph-properties fo:line-height="100%" fo:text-align="justify" style:justify-single-word="false"/>
      <style:text-properties fo:color="#000000" loext:opacity="100%" fo:font-size="10pt" fo:language="en" fo:country="US" officeooo:rsid="0003f3bf" officeooo:paragraph-rsid="0016ddac" style:font-size-asian="10pt" style:font-size-complex="10pt" style:script-type="latin"/>
    </style:style>
    <style:style style:name="P7" style:family="paragraph" style:parent-style-name="Text_20_body">
      <style:paragraph-properties fo:line-height="100%" fo:text-align="left" style:justify-single-word="false"/>
      <style:text-properties fo:color="#000000" loext:opacity="100%" fo:font-size="10pt" fo:language="en" fo:country="US" officeooo:rsid="0003f3bf" officeooo:paragraph-rsid="0016ddac" style:font-size-asian="10pt" style:font-size-complex="10pt" style:script-type="latin"/>
    </style:style>
    <style:style style:name="P8" style:family="paragraph" style:parent-style-name="Text_20_body">
      <style:paragraph-properties fo:line-height="100%" fo:text-align="left" style:justify-single-word="false"/>
      <style:text-properties fo:color="#000000" loext:opacity="100%" fo:font-size="10pt" fo:language="en" fo:country="US" officeooo:rsid="0003f3bf" style:font-size-asian="10pt" style:font-size-complex="10pt" style:script-type="latin"/>
    </style:style>
    <style:style style:name="P9" style:family="paragraph" style:parent-style-name="Text_20_body" style:list-style-name="L1">
      <style:paragraph-properties fo:line-height="100%" fo:text-align="left" style:justify-single-word="false"/>
      <style:text-properties fo:color="#000000" loext:opacity="100%" fo:font-size="10pt" fo:language="en" fo:country="US" officeooo:rsid="0003f3bf" style:font-size-asian="10pt" style:font-size-complex="10pt" style:script-type="latin"/>
    </style:style>
    <style:style style:name="P10" style:family="paragraph" style:parent-style-name="Text_20_body" style:list-style-name="L2">
      <style:paragraph-properties fo:line-height="100%" fo:text-align="left" style:justify-single-word="false"/>
      <style:text-properties fo:color="#000000" loext:opacity="100%" fo:font-size="10pt" fo:language="en" fo:country="US" officeooo:rsid="0003f3bf" style:font-size-asian="10pt" style:font-size-complex="10pt" style:script-type="latin"/>
    </style:style>
    <style:style style:name="P11" style:family="paragraph" style:parent-style-name="Text_20_body" style:list-style-name="L3">
      <style:paragraph-properties fo:line-height="100%" fo:text-align="left" style:justify-single-word="false"/>
      <style:text-properties fo:color="#000000" loext:opacity="100%" fo:font-size="10pt" fo:language="en" fo:country="US" officeooo:rsid="0003f3bf" style:font-size-asian="10pt" style:font-size-complex="10pt" style:script-type="latin"/>
    </style:style>
    <style:style style:name="P12" style:family="paragraph" style:parent-style-name="Text_20_body">
      <style:paragraph-properties fo:line-height="100%" fo:text-align="left" style:justify-single-word="false"/>
      <style:text-properties fo:color="#000000" loext:opacity="100%" fo:font-size="10pt" fo:language="en" fo:country="US" officeooo:rsid="0003f3bf" officeooo:paragraph-rsid="001b38ad" style:font-size-asian="10pt" style:font-size-complex="10pt" style:script-type="latin"/>
    </style:style>
    <style:style style:name="P13" style:family="paragraph" style:parent-style-name="Text_20_body">
      <style:paragraph-properties fo:line-height="100%" fo:text-align="left" style:justify-single-word="false"/>
      <style:text-properties fo:color="#000000" loext:opacity="100%" fo:font-size="10pt" fo:language="en" fo:country="US" officeooo:rsid="0003f3bf" officeooo:paragraph-rsid="001e30ff" style:font-size-asian="10pt" style:font-size-complex="10pt" style:script-type="latin"/>
    </style:style>
    <style:style style:name="P14" style:family="paragraph" style:parent-style-name="Text_20_body" style:list-style-name="L4">
      <style:paragraph-properties fo:line-height="100%" fo:text-align="left" style:justify-single-word="false"/>
      <style:text-properties fo:color="#000000" loext:opacity="100%" fo:font-size="10pt" fo:language="en" fo:country="US" officeooo:rsid="0003f3bf" style:font-size-asian="10pt" style:font-size-complex="10pt" style:script-type="latin"/>
    </style:style>
    <style:style style:name="P15" style:family="paragraph" style:parent-style-name="Text_20_body" style:list-style-name="L5">
      <style:paragraph-properties fo:line-height="100%" fo:text-align="left" style:justify-single-word="false"/>
      <style:text-properties fo:color="#000000" loext:opacity="100%" fo:font-size="10pt" fo:language="en" fo:country="US" officeooo:rsid="0003f3bf" style:font-size-asian="10pt" style:font-size-complex="10pt" style:script-type="latin"/>
    </style:style>
    <style:style style:name="P16" style:family="paragraph" style:parent-style-name="Text_20_body" style:list-style-name="L6">
      <style:paragraph-properties fo:line-height="100%" fo:text-align="left" style:justify-single-word="false"/>
      <style:text-properties fo:color="#000000" loext:opacity="100%" fo:font-size="10pt" fo:language="en" fo:country="US" officeooo:rsid="0003f3bf" style:font-size-asian="10pt" style:font-size-complex="10pt" style:script-type="latin"/>
    </style:style>
    <style:style style:name="P17" style:family="paragraph" style:parent-style-name="Heading_20_3">
      <style:paragraph-properties fo:text-align="left" style:justify-single-word="false"/>
      <style:text-properties fo:color="#000000" loext:opacity="100%" fo:font-size="10pt" fo:language="en" fo:country="US" fo:font-weight="normal" officeooo:rsid="0003f3bf" officeooo:paragraph-rsid="001871a3" style:font-size-asian="10pt" style:font-weight-asian="normal" style:font-size-complex="10pt" style:font-weight-complex="normal" style:script-type="latin"/>
    </style:style>
    <style:style style:name="P18" style:family="paragraph" style:parent-style-name="Text_20_body">
      <style:paragraph-properties fo:line-height="100%" fo:text-align="left" style:justify-single-word="false"/>
      <style:text-properties fo:color="#000000" loext:opacity="100%" fo:font-size="10pt" fo:language="en" fo:country="US" officeooo:rsid="0003f3bf" officeooo:paragraph-rsid="001871a3" style:font-size-asian="10pt" style:font-size-complex="10pt" style:script-type="latin"/>
    </style:style>
    <style:style style:name="P19" style:family="paragraph" style:parent-style-name="Text_20_body">
      <style:paragraph-properties fo:line-height="100%" fo:text-align="left" style:justify-single-word="false"/>
      <style:text-properties fo:color="#000000" loext:opacity="100%" fo:font-size="10pt" fo:language="en" fo:country="US" officeooo:rsid="0003f3bf" officeooo:paragraph-rsid="00188f31" style:font-size-asian="10pt" style:font-size-complex="10pt" style:script-type="lati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fo:language="en" fo:country="US" fo:font-weight="bold" style:font-size-asian="10pt" style:font-weight-asian="bold" style:font-size-complex="10pt" style:font-weight-complex="bold" style:script-type="latin"/>
    </style:style>
    <style:style style:name="T3" style:family="text">
      <style:text-properties fo:font-size="10pt" fo:language="en" fo:country="US" style:font-size-asian="10pt" style:font-size-complex="10pt" style:script-type="latin"/>
    </style:style>
    <style:style style:name="T4" style:family="text">
      <style:text-properties fo:font-size="10pt" fo:language="en" fo:country="US" fo:font-weight="bold" officeooo:rsid="000088d3" style:font-size-asian="10pt" style:font-weight-asian="bold" style:font-size-complex="10pt" style:font-weight-complex="bold" style:script-type="latin"/>
    </style:style>
    <style:style style:name="T5" style:family="text">
      <style:text-properties fo:font-size="10pt" fo:language="en" fo:country="US" officeooo:rsid="000088d3" style:font-size-asian="10pt" style:font-size-complex="10pt" style:script-type="latin"/>
    </style:style>
    <style:style style:name="T6" style:family="text">
      <style:text-properties officeooo:rsid="00272575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62236" style:font-weight-asian="normal" style:font-weight-complex="normal"/>
    </style:style>
    <style:style style:name="T9" style:family="text">
      <style:text-properties officeooo:rsid="00188f31"/>
    </style:style>
    <style:style style:name="T10" style:family="text">
      <style:text-properties officeooo:rsid="001e30ff"/>
    </style:style>
    <style:style style:name="T11" style:family="text">
      <style:text-properties officeooo:rsid="0019a25a"/>
    </style:style>
    <style:style style:name="T12" style:family="text">
      <style:text-properties officeooo:rsid="00232b1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dison Amin Reyes Cedano | Backend Engineer</text:p>
      <text:p text:style-name="P2"/>
      <text:p text:style-name="P2"><text:span text:style-name="T1">Location:</text:span> Santo Domingo Este, Dominican Republic</text:p>
      <text:p text:style-name="P2"><text:span text:style-name="T1">Phone:</text:span> +1 849-359-3664</text:p>
      <text:p text:style-name="P3"><text:span text:style-name="T2">Email:</text:span><text:span text:style-name="T3"> </text:span><text:a xlink:type="simple" xlink:href="mailto:addison.amin@gmail.com" text:style-name="Internet_20_link" text:visited-style-name="Visited_20_Internet_20_Link"><text:span text:style-name="T3">addison.amin@gmail.com</text:span></text:a></text:p>
      <text:p text:style-name="P3"><text:span text:style-name="T2">Website:</text:span><text:span text:style-name="T3"> </text:span><text:a xlink:type="simple" xlink:href="https://addisonreyes.com/" text:style-name="Internet_20_link" text:visited-style-name="Visited_20_Internet_20_Link"><text:span text:style-name="T3">https://addisonreyes.com</text:span></text:a></text:p>
      <text:p text:style-name="P3"><text:span text:style-name="T2">LinkedIn:</text:span><text:span text:style-name="T3"> </text:span><text:a xlink:type="simple" xlink:href="https://www.linkedin.com/in/addison-reyes-9aa017208/" text:style-name="Internet_20_link" text:visited-style-name="Visited_20_Internet_20_Link"><text:span text:style-name="T3">https://www.linkedin.com/in/addison-reyes-9aa017208/</text:span></text:a></text:p>
      <text:p text:style-name="P4"><text:span text:style-name="T4">GitHub:</text:span><text:span text:style-name="T5"> </text:span><text:a xlink:type="simple" xlink:href="https://github.com/AddisonReyes" text:style-name="Internet_20_link" text:visited-style-name="Visited_20_Internet_20_Link"><text:span text:style-name="T5">https://github.com/AddisonReyes</text:span></text:a></text:p>
      <text:p text:style-name="P5"/>
      <text:p text:style-name="P6">Backend engineer focused on building reliable backend services, clear domain logic, and <text:span text:style-name="T6">robust</text:span> systems. Experienced with TypeScript and Rust, specializing in API development, authentication, data modeling, backend architecture, tooling, and performance-oriented implementation. I care about writing maintainable software that is practical, scalable, and pleasant to use. </text:p>
      <text:p text:style-name="P6"><text:span text:style-name="Strong_20_Emphasis"/></text:p>
      <text:p text:style-name="P6"><text:span text:style-name="Strong_20_Emphasis">SKILLS</text:span></text:p>
      <text:p text:style-name="P6"><text:span text:style-name="Strong_20_Emphasis">Languages: </text:span><text:span text:style-name="Strong_20_Emphasis"><text:span text:style-name="T7">TypeScript, Rust, Python</text:span></text:span></text:p>
      <text:p text:style-name="P6"><text:span text:style-name="Strong_20_Emphasis">Backend: </text:span><text:span text:style-name="Strong_20_Emphasis"><text:span text:style-name="T7">Node.js, Express, </text:span></text:span><text:span text:style-name="Strong_20_Emphasis"><text:span text:style-name="T8">Nest, </text:span></text:span><text:span text:style-name="Strong_20_Emphasis"><text:span text:style-name="T7">REST APIs, Authentication, OpenAPI/Swagger, Async Programming</text:span></text:span></text:p>
      <text:p text:style-name="P6"><text:span text:style-name="Strong_20_Emphasis">Databases: </text:span><text:span text:style-name="Strong_20_Emphasis"><text:span text:style-name="T7">PostgreSQL, MongoDB, SQL, Data Modeling, ORM/ODM Tools</text:span></text:span></text:p>
      <text:p text:style-name="P6"><text:span text:style-name="Strong_20_Emphasis">Tools &amp; Infrastructure: </text:span><text:span text:style-name="Strong_20_Emphasis"><text:span text:style-name="T7">Docker, Git, Linux, CI/CD Basics, API Integration, Automation</text:span></text:span></text:p>
      <text:p text:style-name="P6"><text:span text:style-name="Strong_20_Emphasis">Software Engineering: </text:span><text:span text:style-name="Strong_20_Emphasis"><text:span text:style-name="T7">Backend Architecture, System Design, Scalable Services, Performance Optimization</text:span></text:span></text:p>
      <text:p text:style-name="P7"><text:span text:style-name="Strong_20_Emphasis"/></text:p>
      <text:p text:style-name="P7"><text:span text:style-name="Strong_20_Emphasis">EXPERIENCE</text:span></text:p>
      <text:p text:style-name="P8"><text:span text:style-name="Strong_20_Emphasis">SEMS, SRL | Distrito Nacional, Dominican Republic</text:span><text:line-break/><text:span text:style-name="Strong_20_Emphasis">Software Developer | Full-time, Hybrid | May 2024 - Present</text:span></text:p>
      <text:list text:style-name="L1">
        <text:list-item>
          <text:p text:style-name="P9">Designed and implemented backend services and business logic supporting core company operations, handling complex workflows and validation rules.</text:p>
        </text:list-item>
        <text:list-item>
          <text:p text:style-name="P9">Developed and maintained RESTful APIs for system interoperability and integration with internal and external applications.</text:p>
        </text:list-item>
        <text:list-item>
          <text:p text:style-name="P9">Built backend systems using Django to enable data exchange, automation, and service integration.</text:p>
        </text:list-item>
        <text:list-item>
          <text:p text:style-name="P9">Designed scalable data models and optimized ORM-based data access patterns for performance and maintainability.</text:p>
        </text:list-item>
        <text:list-item>
          <text:p text:style-name="P9">Implemented automated reporting systems and internal business intelligence tools, improving data accessibility and operational visibility.</text:p>
        </text:list-item>
        <text:list-item>
          <text:p text:style-name="P9">Collaborated with cross-functional stakeholders to gather requirements and deliver scalable, production-ready software solutions.</text:p>
        </text:list-item>
      </text:list>
      <text:p text:style-name="P8"><text:span text:style-name="Strong_20_Emphasis"><text:line-break/>SEMS, SRL | Distrito Nacional, Dominican Republic</text:span><text:line-break/><text:span text:style-name="Strong_20_Emphasis">Data Analyst | Internship, On-site | Feb 2024 - May 2024</text:span></text:p>
      <text:list text:style-name="L2">
        <text:list-item>
          <text:p text:style-name="P10">Developed data analysis workflows and visualization dashboards to support business decision-making.</text:p>
        </text:list-item>
        <text:list-item>
          <text:p text:style-name="P10">Automated reporting processes, reducing manual data handling and improving reporting efficiency.</text:p>
        </text:list-item>
      </text:list>
      <text:p text:style-name="P8"><text:span text:style-name="Strong_20_Emphasis"><text:line-break/>OXSIS, SRL | Santo Domingo Este, Dominican Republic</text:span><text:line-break/><text:span text:style-name="Strong_20_Emphasis">IT Support Specialist | Part-time, Hybrid | Sep 2020 - Aug 2025</text:span></text:p>
      <text:list text:style-name="L3">
        <text:list-item>
          <text:p text:style-name="P11">Provided technical support, system maintenance, and troubleshooting in a logistics and customs environment.</text:p>
        </text:list-item>
        <text:list-item>
          <text:p text:style-name="P11">Assisted in data management, internal systems support, and process automation initiatives.</text:p>
        </text:list-item>
        <text:list-item>
          <text:p text:style-name="P11">Supported operational continuity by resolving technical issues and improving system reliability.</text:p>
        </text:list-item>
      </text:list>
      <text:p text:style-name="P12"><text:span text:style-name="Strong_20_Emphasis"/></text:p>
      <text:p text:style-name="P7"><text:soft-page-break/><text:span text:style-name="Strong_20_Emphasis">PROJECTS</text:span></text:p>
      <text:p text:style-name="P13"><text:span text:style-name="Strong_20_Emphasis">MiniFT</text:span> - Personal Finance Tracking Application<text:line-break/><text:span text:style-name="T9">Website: </text:span><text:a xlink:type="simple" xlink:href="https://minift.net/" text:style-name="Internet_20_link" text:visited-style-name="Visited_20_Internet_20_Link">https://minift.net/</text:a></text:p>
      <text:p text:style-name="P8">Finance tracker built around a Rust backend, PostgreSQL data modeling, authentication, containerized deployment, and a TypeScript interface for managing transactions, budgets, and financial habits.<text:line-break/>Tech: Rust, <text:span text:style-name="T10">Rocket, </text:span>PostgreSQL, <text:span text:style-name="T10">TypeScript, </text:span>Next.js, React, Tailwind CSS, Docker</text:p>
      <text:list text:style-name="L4">
        <text:list-item>
          <text:p text:style-name="P14">Designed and developed a production-ready application centered on Rust backend services, PostgreSQL persistence, authentication, and maintainable domain logic.</text:p>
        </text:list-item>
        <text:list-item>
          <text:p text:style-name="P14">Containerized the application using Docker for consistent deployment environments.</text:p>
        </text:list-item>
      </text:list>
      <text:p text:style-name="P13"><text:span text:style-name="Strong_20_Emphasis"><text:line-break/>AnimeSR</text:span> - Anime Recommendation &amp; Discovery Platform<text:line-break/><text:span text:style-name="T9">Website: </text:span><text:a xlink:type="simple" xlink:href="https://animesr.pages.dev/" text:style-name="Internet_20_link" text:visited-style-name="Visited_20_Internet_20_Link">https://animesr.pages.dev/</text:a><text:line-break/>Swagger UI<text:span text:style-name="T9">: </text:span><text:a xlink:type="simple" xlink:href="https://animesr.up.railway.app/docs" text:style-name="Internet_20_link" text:visited-style-name="Visited_20_Internet_20_Link"><text:span text:style-name="T9">https://animesr.up.railway.app/</text:span><text:span text:style-name="T11">docs</text:span></text:a><text:span text:style-name="T11"> </text:span><text:span text:style-name="T10">(API Doc)</text:span><text:line-break/><text:span text:style-name="T9">Code: </text:span><text:a xlink:type="simple" xlink:href="https://github.com/AddisonReyes/AnimeSR" text:style-name="Internet_20_link" text:visited-style-name="Visited_20_Internet_20_Link"><text:span text:style-name="T9">https://github.com/AddisonReyes/AnimeSR</text:span></text:a></text:p>
      <text:p text:style-name="P8">Recommendation-oriented catalog pairing backend filtering and search logic with a TypeScript interface for anime discovery.<text:line-break/>Tech: FastAPI, Scikit-Learn, Next.js, React, <text:span text:style-name="T10">TypeScript, </text:span><text:span text:style-name="T12">Docker</text:span></text:p>
      <text:list text:style-name="L5">
        <text:list-item>
          <text:p text:style-name="P15">Developed backend search and recommendation services with FastAPI and Scikit-Learn for content-based filtering, plus RESTful APIs for catalog discovery and data retrieval.</text:p>
        </text:list-item>
        <text:list-item>
          <text:p text:style-name="P15">Integrated recommendation logic into backend services and implemented API documentation and endpoints for external consumption.</text:p>
        </text:list-item>
      </text:list>
      <text:p text:style-name="P8"><text:span text:style-name="Strong_20_Emphasis"><text:line-break/>EasyToDo</text:span> - Local-First Productivity Application<text:line-break/><text:span text:style-name="T9">Website: </text:span><text:a xlink:type="simple" xlink:href="https://easy-to-do.pages.dev/" text:style-name="Internet_20_link" text:visited-style-name="Visited_20_Internet_20_Link">https://easy-to-do.pages.dev/</text:a><text:line-break/><text:span text:style-name="T9">Code: </text:span><text:a xlink:type="simple" xlink:href="https://github.com/AddisonReyes/easy-to-do" text:style-name="Internet_20_link" text:visited-style-name="Visited_20_Internet_20_Link">https://github.com/AddisonReyes/easy-to-do</text:a></text:p>
      <text:p text:style-name="P8">Local-first TypeScript app focused on fast state handling, clean product logic, and a deliberately minimal task and habit workflow.<text:line-break/>Tech: <text:span text:style-name="T10">TypeScript, </text:span>Next.js, React, Tailwind CSS</text:p>
      <text:list text:style-name="L6">
        <text:list-item>
          <text:p text:style-name="P16">Implemented local-first data handling and fast state updates for reliable task management in a distraction-free workflow.</text:p>
        </text:list-item>
      </text:list>
      <text:h text:style-name="P17" text:outline-level="3"><text:span text:style-name="Strong_20_Emphasis"><text:line-break/>EDUCATION</text:span></text:h>
      <text:p text:style-name="P18"><text:span text:style-name="Strong_20_Emphasis">UNICARIBE</text:span> - Engineer's Degree, Software Engineering<text:line-break/>Apr 2025 - Present</text:p>
      <text:p text:style-name="P19"><text:span text:style-name="Strong_20_Emphasis">ITLA - </text:span><text:span text:style-name="Strong_20_Emphasis"><text:span text:style-name="T7">Associate's Degree, Artificial Intelligence<text:line-break/>Aug 2021 - Dec 2023</text:span></text:span></text:p>
      <text:p text:style-name="P19"><text:span text:style-name="Strong_20_Emphasis"><text:line-break/>LANGUAGES</text:span></text:p>
      <text:p text:style-name="P18"><text:span text:style-name="Strong_20_Emphasis">Spanish - </text:span><text:span text:style-name="Strong_20_Emphasis"><text:span text:style-name="T7">Native</text:span></text:span><text:span text:style-name="Strong_20_Emphasis"><text:line-break/>English - </text:span><text:span text:style-name="Strong_20_Emphasis"><text:span text:style-name="T7">B2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DO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DO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8T18:45:03.583305367</meta:creation-date>
    <dc:date>2026-05-16T19:27:03.071475644</dc:date>
    <meta:editing-duration>PT2H47M21S</meta:editing-duration>
    <meta:editing-cycles>29</meta:editing-cycles>
    <meta:generator>LibreOffice/26.2.3.2$Linux_X86_64 LibreOffice_project/d4d5ed47b6084125f28d269a5650105d54dde034</meta:generator>
    <meta:print-date>2026-05-16T18:58:06.549815842</meta:print-date>
    <meta:printed-by>Archivos PDF</meta:printed-by>
    <meta:document-statistic meta:table-count="0" meta:image-count="0" meta:object-count="0" meta:page-count="2" meta:paragraph-count="46" meta:word-count="555" meta:character-count="4525" meta:non-whitespace-character-count="4025"/>
  </office:meta>
</office:document-meta>
</file>